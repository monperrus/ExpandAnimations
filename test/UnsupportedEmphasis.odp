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vo" svg:font-family="Arvo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Math" svg:font-family="'Latin Modern Math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  <style:font-face style:name="cmmi10" svg:font-family="cmmi10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loext:decorative="false"/>
    </style:style>
    <style:style style:name="gr2" style:family="graphic" style:parent-style-name="Default_20_Drawing_20_Style_5f_1">
      <style:graphic-properties draw:stroke="solid" svg:stroke-width="0.112cm" svg:stroke-color="#cc0000" svg:stroke-linecap="round" draw:fill="none" draw:opacity="100%" fo:padding-top="0.056cm" fo:padding-bottom="0.056cm" fo:padding-left="0.056cm" fo:padding-right="0.056cm" draw:shadow-opacity="100%" loext:decorative="false"/>
    </style:style>
    <style:style style:name="gr3" style:family="graphic" style:parent-style-name="Default_20_Drawing_20_Style_5f_1">
      <style:graphic-properties draw:stroke="solid" svg:stroke-width="0.112cm" svg:stroke-color="#ffff00" svg:stroke-linecap="round" draw:fill="none" draw:opacity="100%" fo:padding-top="0.056cm" fo:padding-bottom="0.056cm" fo:padding-left="0.056cm" fo:padding-right="0.056cm" draw:shadow-opacity="100%" loext:decorative="false"/>
    </style:style>
    <style:style style:name="gr4" style:family="graphic" style:parent-style-name="standard">
      <style:graphic-properties draw:stroke="solid" svg:stroke-width="0.112cm" svg:stroke-color="#cc0000" draw:fill="none" draw:opacity="100%" fo:padding-top="0.056cm" fo:padding-bottom="0.056cm" fo:padding-left="0.056cm" fo:padding-right="0.056cm" draw:shadow-opacity="100%" loext:decorative="false"/>
    </style:style>
    <style:style style:name="gr5" style:family="graphic" style:parent-style-name="standard">
      <style:graphic-properties draw:stroke="solid" svg:stroke-width="0.112cm" svg:stroke-color="#ffff00" draw:fill="none" draw:opacity="100%" fo:padding-top="0.056cm" fo:padding-bottom="0.056cm" fo:padding-left="0.056cm" fo:padding-right="0.056cm" draw:shadow-opacity="100%" loext:decorative="false"/>
    </style:style>
    <style:style style:name="gr6" style:family="graphic" style:parent-style-name="Default_20_Drawing_20_Style_5f_1" style:list-style-name="L2">
      <style:graphic-properties draw:stroke="none" draw:fill="none" draw:fill-color="#729fcf" fo:min-height="11.929cm" loext:decorative="false"/>
      <style:paragraph-properties style:writing-mode="lr-tb"/>
    </style:style>
    <style:style style:name="gr7" style:family="graphic" style:parent-style-name="Default_20_Drawing_20_Style_5f_1">
      <style:graphic-properties draw:stroke="dash" svg:stroke-width="0.056cm" svg:stroke-color="#ffffff" draw:fill="none" draw:opacity="100%" fo:padding-top="0.028cm" fo:padding-bottom="0.028cm" fo:padding-left="0.028cm" fo:padding-right="0.028cm" draw:shadow-opacity="100%" loext:decorative="false"/>
    </style:style>
    <style:style style:name="gr8" style:family="graphic">
      <style:graphic-properties style:protect="size" loext:decorative="false"/>
    </style:style>
    <style:style style:name="gr9" style:family="graphic" style:parent-style-name="Object_20_without_20_fill_5f_1">
      <style:graphic-properties svg:stroke-width="0.33cm" svg:stroke-color="#3faf46" draw:marker-start-width="0.698cm" draw:marker-end="" draw:marker-end-width="0.698cm" svg:stroke-linecap="round" draw:fill="none" draw:textarea-vertical-align="middle" fo:padding-top="0.273cm" fo:padding-bottom="0.273cm" fo:padding-left="0.398cm" fo:padding-right="0.398cm" loext:decorative="false"/>
    </style:style>
    <style:style style:name="gr10" style:family="graphic" style:parent-style-name="Object_20_without_20_fill_5f_1">
      <style:graphic-properties svg:stroke-width="0.381cm" svg:stroke-color="#5983b0" draw:marker-start-width="0.774cm" draw:marker-end="" draw:marker-end-width="0.774cm" svg:stroke-linecap="round" draw:fill="none" draw:textarea-vertical-align="middle" fo:padding-top="0.298cm" fo:padding-bottom="0.298cm" fo:padding-left="0.423cm" fo:padding-right="0.423cm" loext:decorative="false"/>
      <style:paragraph-properties style:writing-mode="lr-tb"/>
    </style:style>
    <style:style style:name="gr11" style:family="graphic" style:parent-style-name="Object_20_without_20_fill_5f_1">
      <style:graphic-properties svg:stroke-width="0.432cm" svg:stroke-color="#5983b0" draw:marker-start="" draw:marker-start-width="0.85cm" draw:marker-end="" draw:marker-end-width="0.85cm" svg:stroke-linecap="round" draw:fill="none" draw:textarea-vertical-align="middle" fo:padding-top="0.323cm" fo:padding-bottom="0.323cm" fo:padding-left="0.448cm" fo:padding-right="0.448cm" loext:decorative="false"/>
      <style:paragraph-properties style:writing-mode="lr-tb"/>
    </style:style>
    <style:style style:name="gr12" style:family="graphic" style:parent-style-name="Default_20_Drawing_20_Style_5f_1">
      <style:graphic-properties draw:stroke="dash" draw:stroke-dash="Dash_20__28_Rounded_29_" svg:stroke-width="0.119cm" svg:stroke-color="#ffffff" draw:stroke-linejoin="round" svg:stroke-linecap="round" draw:fill="none" draw:textarea-horizontal-align="center" draw:textarea-vertical-align="middle" fo:padding-top="0.169cm" fo:padding-bottom="0.169cm" fo:padding-left="0.294cm" fo:padding-right="0.294cm" loext:decorative="false"/>
    </style:style>
    <style:style style:name="gr13" style:family="graphic" style:parent-style-name="Default_20_Drawing_20_Style_5f_1">
      <style:graphic-properties draw:stroke="dash" draw:stroke-dash="Dash_20__28_Rounded_29_" svg:stroke-width="0.119cm" svg:stroke-color="#666666" draw:stroke-linejoin="round" svg:stroke-linecap="round" draw:fill="none" draw:textarea-horizontal-align="center" draw:textarea-vertical-align="middle" fo:padding-top="0.169cm" fo:padding-bottom="0.169cm" fo:padding-left="0.294cm" fo:padding-right="0.294cm" loext:decorative="false"/>
    </style:style>
    <style:style style:name="gr14" style:family="graphic" style:parent-style-name="Default_20_Drawing_20_Style_5f_1">
      <style:graphic-properties draw:stroke="solid" draw:stroke-dash="Dashed_20__28_var_29__20_2" svg:stroke-width="0.119cm" svg:stroke-color="#666666" draw:stroke-linejoin="round" svg:stroke-linecap="round" draw:textarea-horizontal-align="center" draw:textarea-vertical-align="middle" fo:padding-top="0.169cm" fo:padding-bottom="0.169cm" fo:padding-left="0.294cm" fo:padding-right="0.294cm" loext:decorative="false"/>
    </style:style>
    <style:style style:name="gr15" style:family="graphic" style:parent-style-name="Default_20_Drawing_20_Style_5f_1">
      <style:graphic-properties draw:stroke="solid" draw:stroke-dash="Dashed_20__28_var_29__20_2" svg:stroke-width="0.119cm" svg:stroke-color="#ffffff" draw:stroke-linejoin="round" svg:stroke-linecap="round" draw:textarea-horizontal-align="center" draw:textarea-vertical-align="middle" fo:padding-top="0.169cm" fo:padding-bottom="0.169cm" fo:padding-left="0.294cm" fo:padding-right="0.294cm" loext:decorative="false"/>
    </style:style>
    <style:style style:name="gr16" style:family="graphic" style:parent-style-name="Default_20_Drawing_20_Style_5f_1">
      <style:graphic-properties draw:stroke="none" draw:stroke-dash="Dashed_20__28_var_29__20_2" svg:stroke-width="0cm" svg:stroke-color="#666666" draw:stroke-linejoin="none" svg:stroke-linecap="butt" draw:fill="solid" draw:fill-color="#ffffff" draw:textarea-horizontal-align="center" draw:textarea-vertical-align="middle" loext:decorative="false"/>
    </style:style>
    <style:style style:name="gr17" style:family="graphic" style:parent-style-name="Default_20_Drawing_20_Style_5f_1">
      <style:graphic-properties draw:stroke="solid" draw:stroke-dash="Dashed_20__28_var_29__20_2" svg:stroke-width="0.024cm" svg:stroke-color="#ffffff" draw:stroke-linejoin="round" svg:stroke-linecap="round" draw:fill="none" draw:fill-color="#ffffff" draw:textarea-horizontal-align="center" draw:textarea-vertical-align="middle" fo:padding-top="0.122cm" fo:padding-bottom="0.122cm" fo:padding-left="0.247cm" fo:padding-right="0.247cm" loext:decorative="false"/>
    </style:style>
    <style:style style:name="gr18" style:family="graphic" style:parent-style-name="Default_20_Drawing_20_Style_5f_1">
      <style:graphic-properties draw:stroke="none" draw:stroke-dash="Dashed_20__28_var_29__20_2" svg:stroke-width="0cm" svg:stroke-color="#ffffff" draw:stroke-linejoin="none" svg:stroke-linecap="round" draw:fill="solid" draw:fill-color="#ffffff" draw:textarea-horizontal-align="center" draw:textarea-vertical-align="middle" loext:decorative="false"/>
    </style:style>
    <style:style style:name="gr19" style:family="graphic" style:parent-style-name="Default_20_Drawing_20_Style_5f_1">
      <style:graphic-properties draw:stroke="solid" draw:stroke-dash="Dashed_20__28_var_29__20_2" svg:stroke-width="0.119cm" svg:stroke-color="#666666" draw:stroke-linejoin="round" svg:stroke-linecap="butt" draw:textarea-horizontal-align="center" draw:textarea-vertical-align="middle" fo:padding-top="0.169cm" fo:padding-bottom="0.169cm" fo:padding-left="0.294cm" fo:padding-right="0.294cm" loext:decorative="false"/>
    </style:style>
    <style:style style:name="gr20" style:family="graphic" style:parent-style-name="Default_20_Drawing_20_Style_5f_1">
      <style:graphic-properties draw:stroke="solid" draw:stroke-dash="Dashed_20__28_var_29__20_2" svg:stroke-width="0.119cm" svg:stroke-color="#ffffff" draw:stroke-linejoin="round" svg:stroke-linecap="butt" draw:textarea-horizontal-align="center" draw:textarea-vertical-align="middle" fo:padding-top="0.169cm" fo:padding-bottom="0.169cm" fo:padding-left="0.294cm" fo:padding-right="0.294cm" loext:decorative="false"/>
    </style:style>
    <style:style style:name="gr21" style:family="graphic" style:parent-style-name="Default_20_Drawing_20_Style_5f_1">
      <style:graphic-properties draw:stroke="none" draw:stroke-dash="Dashed_20__28_var_29__20_2" svg:stroke-width="0cm" svg:stroke-color="#ffffff" draw:stroke-linejoin="none" svg:stroke-linecap="butt" draw:fill="solid" draw:fill-color="#ffffff" draw:textarea-horizontal-align="center" draw:textarea-vertical-align="middle" loext:decorative="false"/>
    </style:style>
    <style:style style:name="gr22" style:family="graphic" style:parent-style-name="Default_20_Drawing_20_Style_5f_1">
      <style:graphic-properties draw:stroke="solid" draw:stroke-dash="Dashed_20__28_var_29__20_2" svg:stroke-width="0.023cm" svg:stroke-color="#ffffff" draw:stroke-linejoin="round" svg:stroke-linecap="round" draw:fill="none" draw:fill-color="#ffffff" draw:textarea-horizontal-align="center" draw:textarea-vertical-align="middle" fo:padding-top="0.122cm" fo:padding-bottom="0.122cm" fo:padding-left="0.247cm" fo:padding-right="0.247cm" loext:decorative="false"/>
    </style:style>
    <style:style style:name="gr23" style:family="graphic">
      <style:graphic-properties style:writing-mode="lr-tb" loext:decorative="false"/>
    </style:style>
    <style:style style:name="gr24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 loext:decorative="false"/>
    </style:style>
    <style:style style:name="gr25" style:family="graphic" style:parent-style-name="Default_20_Drawing_20_Style_5f_1">
      <style:graphic-properties draw:stroke="none" draw:stroke-dash="Dashed_20__28_var_29__20_2" svg:stroke-width="0cm" svg:stroke-color="#ffffff" draw:stroke-linejoin="none" svg:stroke-linecap="round" draw:fill="solid" draw:fill-color="#000000" draw:textarea-horizontal-align="center" draw:textarea-vertical-align="middle" loext:decorative="false"/>
    </style:style>
    <style:style style:name="gr26" style:family="graphic" style:parent-style-name="Default_20_Drawing_20_Style_5f_1">
      <style:graphic-properties draw:stroke="solid" draw:stroke-dash="Dashed_20__28_var_29__20_2" svg:stroke-width="0.097cm" svg:stroke-color="#ffffff" draw:stroke-linejoin="round" svg:stroke-linecap="round" draw:fill="none" draw:fill-color="#000000" draw:textarea-horizontal-align="center" draw:textarea-vertical-align="middle" fo:padding-top="0.158cm" fo:padding-bottom="0.158cm" fo:padding-left="0.283cm" fo:padding-right="0.283cm" loext:decorative="false"/>
    </style:style>
    <style:style style:name="pr1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2" style:family="presentation" style:parent-style-name="One_20_Column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One_20_Column-outline1">
      <style:graphic-properties fo:min-height="10.856cm" loext:decorative="false"/>
      <style:paragraph-properties style:writing-mode="lr-tb"/>
    </style:style>
    <style:style style:name="P1" style:family="paragraph">
      <loext:graphic-properties draw:fill="none" draw:opacity="100%"/>
      <style:text-properties fo:language="en" fo:country="US"/>
    </style:style>
    <style:style style:name="P2" style:family="paragraph">
      <style:text-properties fo:font-size="18pt"/>
    </style:style>
    <style:style style:name="P3" style:family="paragraph">
      <loext:graphic-properties draw:fill="none" draw:fill-color="#729fcf"/>
      <style:text-properties fo:font-size="18pt" fo:language="en" fo:country="US"/>
    </style:style>
    <style:style style:name="P4" style:family="paragraph">
      <style:text-properties fo:language="en" fo:country="US"/>
    </style:style>
    <style:style style:name="P5" style:family="paragraph">
      <loext:graphic-properties draw:fill="none" draw:opacity="100%"/>
    </style:style>
    <style:style style:name="P6" style:family="paragraph">
      <style:text-properties fo:font-size="21.2999992370605pt"/>
    </style:style>
    <style:style style:name="P7" style:family="paragraph">
      <loext:graphic-properties draw:fill-color="#ffffff"/>
      <style:text-properties fo:font-size="21.2999992370605pt" fo:language="en" fo:country="US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style:text-properties fo:color="#333333" loext:opacity="100%"/>
    </style:style>
    <style:style style:name="P13" style:family="paragraph">
      <loext:graphic-properties draw:fill="solid" draw:fill-color="#000000"/>
      <style:paragraph-properties fo:text-align="center"/>
    </style:style>
    <style:style style:name="P14" style:family="paragraph">
      <loext:graphic-properties draw:fill="none" draw:fill-color="#000000"/>
      <style:paragraph-properties fo:text-align="center"/>
    </style:style>
    <style:style style:name="P15" style:family="paragraph">
      <loext:graphic-properties draw:fill-color="#ffffff"/>
      <style:text-properties fo:font-size="28.1000003814697pt"/>
    </style:style>
    <style:style style:name="T1" style:family="text">
      <style:text-properties fo:font-size="30pt" fo:language="en" fo:country="US" style:font-size-asian="30pt" style:font-size-complex="30pt"/>
    </style:style>
    <style:style style:name="T2" style:family="text">
      <style:text-properties fo:language="en" fo:country="US"/>
    </style:style>
    <style:style style:name="T3" style:family="text">
      <style:text-properties fo:font-size="21.2999992370605pt" fo:language="en" fo:country="US"/>
    </style:style>
    <style:style style:name="T4" style:family="text">
      <style:text-properties fo:color="#333333" loext:opacity="100%"/>
    </style:style>
    <style:style style:name="T5" style:family="text">
      <style:text-properties fo:color="#333333" loext:opacity="100%" style:font-name="cmmi10"/>
    </style:style>
    <style:style style:name="T6" style:family="text">
      <style:text-properties fo:color="#333333" loext:opacity="100%" style:font-name="Latin Modern Math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ne_20_Column" presentation:presentation-page-layout-name="AL1T19">
        <office:forms form:automatic-focus="false" form:apply-design-mode="false"/>
        <draw:g draw:style-name="gr1" xml:id="id1" draw:id="id1">
          <draw:path draw:style-name="gr2" draw:text-style-name="P1" draw:layer="layout" svg:width="17.283cm" svg:height="6.855cm" svg:x="5.858cm" svg:y="6.615cm" svg:viewBox="0 0 17284 6856" svg:d="M2910 2204c-990 1189-467 1972-148 2045 1983 446 2658-1411 4413-967 2531 640 981 1526 5251 1226 969-68 1997-340 3064 47 1296 468-127 2067-2021 2221-1932 158-4341 180-5058-892-198-299 20-2001-1229-2319-944-242-1328 1173-1821 2042-296 525-2878 1511-3788 575-860-886 692-1339 544-2009-149-669-2428-222-2081-1522 347-1302 1781-2344 3121-2047 795 177 1984 984 2480 1451 576 539 1789 1550 2054 610 405-1451 562-2573 4935-2655 1987-40 4335-34 4560 1523 212 1476-374 1434-1090 2228-923 1021 787 1157 1188 1157">
            <text:p/>
          </draw:path>
          <draw:path draw:style-name="gr3" draw:text-style-name="P1" draw:layer="layout" svg:width="7.777cm" svg:height="2.68cm" svg:x="13.705cm" svg:y="8.148cm" svg:viewBox="0 0 7778 2681" svg:d="M2153 449c-430 200-1904 532-2136 1023-226 476 1887 796 2679 537 792-261 2083-2009 2925-2009 844 0 1135 284 1387 449 347 221 956 1797 714 2093-394 486-1067-410-1754-1016">
            <text:p/>
          </draw:path>
        </draw:g>
        <draw:g draw:style-name="gr1" xml:id="id3" draw:id="id3">
          <draw:path draw:style-name="gr4" draw:text-style-name="P1" draw:layer="layout" svg:width="15.989cm" svg:height="6.303cm" svg:x="5.858cm" svg:y="7.167cm" svg:viewBox="0 0 15990 6304" svg:d="M2910 1650c-990 1190-467 1974-148 2047 1983 445 2658-1412 4413-968 2531 640 981 1527 5251 1227 969-68 1997-340 3064 48 1296 467-127 2066-2021 2220-1932 158-4341 179-5058-892-198-299 20-2001-1229-2320-944-242-1328 1175-1821 2042-296 526-2878 1511-3788 576-860-885 692-1339 544-2009-149-670-2428-222-2081-1524s1781-2344 3121-2046c795 176 1984 983 2480 1451 576 539 1287 808 1951 1058">
            <text:p/>
          </draw:path>
          <draw:path draw:style-name="gr4" draw:text-style-name="P1" draw:layer="layout" svg:width="9.675cm" svg:height="4.916cm" svg:x="13.467cm" svg:y="6.614cm" svg:viewBox="0 0 9676 4917" svg:d="M150 2850c-596-364 495-2758 4868-2840 1987-40 4335-35 4560 1523 212 1476-374 1434-1090 2228-923 1020 787 1156 1188 1156">
            <text:p/>
          </draw:path>
          <draw:path draw:style-name="gr5" draw:text-style-name="P1" draw:layer="layout" svg:width="2.241cm" svg:height="0.868cm" svg:x="13.616cm" svg:y="8.596cm" svg:viewBox="0 0 2242 869" svg:d="M2242 0c-430 200-2233 1042-2242 837">
            <text:p/>
          </draw:path>
          <draw:path draw:style-name="gr5" draw:text-style-name="P1" draw:layer="layout" svg:width="8.036cm" svg:height="2.68cm" svg:x="13.447cm" svg:y="8.147cm" svg:viewBox="0 0 8037 2681" svg:d="M0 1554c495 275 2163 714 2955 455 792-261 2083-2009 2925-2009 844 0 1135 284 1387 449 349 222 956 1798 714 2094-393 485-1067-411-1754-1017">
            <text:p/>
          </draw:path>
        </draw:g>
        <draw:frame draw:style-name="gr6" draw:text-style-name="P3" draw:layer="layout" svg:width="24.631cm" svg:height="11.927cm" svg:x="1.4cm" svg:y="3.412cm">
          <draw:text-box>
            <text:list text:style-name="L2">
              <text:list-item>
                <text:p text:style-name="P2"><text:span text:style-name="T1">3D organization </text:span><text:span text:style-name="T1">of DNA in the </text:span><text:span text:style-name="T1">nucleus</text:span></text:p>
                <text:list>
                  <text:list-item>
                    <text:p text:style-name="P2"><text:span text:style-name="T2">rearrangement </text:span><text:span text:style-name="T2">breakpoints are local in </text:span><text:span text:style-name="T2">3D space</text:span></text:p>
                  </text:list-item>
                </text:list>
              </text:list-item>
            </text:list>
          </draw:text-box>
        </draw:frame>
        <draw:g draw:style-name="gr1" xml:id="id2" draw:id="id2">
          <draw:path draw:style-name="gr2" draw:text-style-name="P1" draw:layer="layout" svg:width="15.989cm" svg:height="6.303cm" svg:x="5.858cm" svg:y="7.167cm" svg:viewBox="0 0 15990 6304" svg:d="M2910 1650c-990 1190-467 1974-148 2047 1983 445 2658-1412 4413-968 2531 640 981 1527 5251 1227 969-68 1997-340 3064 48 1296 467-127 2066-2021 2220-1932 158-4341 179-5058-892-198-299 20-2001-1229-2320-944-242-1328 1175-1821 2042-296 526-2878 1511-3788 576-860-885 692-1339 544-2009-149-670-2428-222-2081-1524s1781-2344 3121-2046c795 176 1984 983 2480 1451 576 539 1251 1249 1812 927">
            <text:p/>
          </draw:path>
          <draw:path draw:style-name="gr2" draw:text-style-name="P1" draw:layer="layout" svg:width="9.592cm" svg:height="4.916cm" svg:x="13.55cm" svg:y="6.614cm" svg:viewBox="0 0 9593 4917" svg:d="M0 2522c405-1451 562-2430 4934-2512 1988-40 4336-35 4561 1523 212 1476-374 1434-1091 2228-922 1020 788 1156 1189 1156">
            <text:p/>
          </draw:path>
          <draw:path draw:style-name="gr3" draw:text-style-name="P1" draw:layer="layout" svg:width="1.955cm" svg:height="0.8cm" svg:x="13.902cm" svg:y="8.596cm" svg:viewBox="0 0 1956 801" svg:d="M1956 0c-429 200-1641 358-1956 801">
            <text:p/>
          </draw:path>
          <draw:path draw:style-name="gr3" draw:text-style-name="P1" draw:layer="layout" svg:width="7.58cm" svg:height="2.68cm" svg:x="13.902cm" svg:y="8.147cm" svg:viewBox="0 0 7581 2681" svg:d="M0 1684c182 409 1707 584 2499 325 792-261 2084-2009 2925-2009 844 0 1135 284 1387 449 349 222 957 1798 715 2094-394 485-1068-411-1755-1017">
            <text:p/>
          </draw:path>
        </draw:g>
        <draw:frame presentation:style-name="pr1" draw:text-style-name="P4" draw:layer="layout" svg:width="26.491cm" svg:height="1.881cm" svg:x="0.399cm" svg:y="0.159cm" presentation:class="title">
          <draw:text-box>
            <text:p><text:span text:style-name="T2">A “local” translocation</text:span></text:p>
          </draw:text-box>
        </draw:frame>
        <draw:path draw:style-name="gr7" draw:text-style-name="P5" draw:layer="layout" svg:width="3.015cm" svg:height="2.943cm" svg:x="11.807cm" svg:y="8.497cm" svg:viewBox="0 0 3016 2944" svg:d="M3016 1471c0 814-675 1473-1508 1473-834 0-1508-659-1508-1473 0-812 675-1471 1508-1471 832 0 1508 659 1508 1471z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8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>
            <draw:text-box>
              <text:p text:style-name="P6"><text:span text:style-name="T3">- focus on circle!</text:span></text:p>
            </draw:text-box>
          </draw:frame>
        </presentation:notes>
      </draw:page>
      <draw:page draw:name="page2" draw:style-name="dp2" draw:master-page-name="One_20_Column" presentation:presentation-page-layout-name="AL2T3">
        <office:forms form:automatic-focus="false" form:apply-design-mode="false"/>
        <draw:g draw:style-name="gr1" xml:id="id8" draw:id="id8">
          <draw:path draw:style-name="gr9" draw:text-style-name="P8" draw:layer="layout" svg:width="1.724cm" svg:height="0.978cm" draw:transform="skewX (-0.00052359877559833) rotate (1.89211144208705) translate (26.1047298683033cm 10.2515836571691cm)" svg:viewBox="0 0 1725 979" svg:d="M753 30c264-52 488 122 653 306 123 137 418 267 286 491-137 231-443 150-653 71-207-78-427-125-632-210-213-90-509-367-372-556 126-174 308-131 522-116l239 18 48 17">
            <text:p/>
          </draw:path>
          <draw:path draw:style-name="gr10" draw:text-style-name="P8" draw:layer="layout" svg:width="6.373cm" svg:height="6.019cm" draw:transform="skewX (0.000174532925199458) rotate (3.01086749261542) translate (23.6439463073014cm 12.5885889587905cm)" svg:viewBox="0 0 6374 6020" svg:d="M3938 98c305-33 456 284 630 469 187 197 408 304 611 453 246 181 537 330 697 597 127 211 327 330 422 581 83 222 113 456 14 636-125 225-213 457-378 652-170 202-243 473-430 659-179 177-250 415-403 603-172 213-302 457-518 636-225 185-521 213-787 293-214 64-438 32-662 70-213 36-429 52-644 85-260 39-525 59-772 153-328 124-487-109-687-254-186-134-170-411-220-626-51-218-166-415-254-621-81-189-172-372-313-544-150-183-236-429-243-674-8-309 21-619 120-926 100-312 137-641 217-959 55-218 165-415 191-645 35-307 395-276 577-454 150-147 378-143 583-147 228-3 458-66 684-37 217 28 418-40 634-15 207 24 401-104 609-80l193 26 288 100 70 8">
            <text:p/>
          </draw:path>
          <draw:path draw:style-name="gr11" draw:text-style-name="P8" draw:layer="layout" svg:width="6.397cm" svg:height="6.765cm" draw:transform="skewX (0.000174532925199456) rotate (1.32592663274009) translate (9.53781215502831cm 11.81324606277cm)" svg:viewBox="0 0 6398 6766" svg:d="M1022 5330c286-39 465 211 683 339 224 133 461 231 687 356 195 108 436 106 621 233 224 153 479 240 700 405 182 137 444 126 658 29 264-119 318-441 518-605 209-169 300-391 467-591 196-232 395-455 564-703 151-224 354-400 446-675 70-208 11-410-28-609-56-282-238-495-249-781-10-285-168-523-170-820-1-269-63-533-128-795-82-329-425-499-675-658-247-158-538-231-807-343-265-111-556-119-837-109-284 11-569 81-832 191-228 95-460 176-686 278-263 118-508 267-762 402-255 135-447 360-674 536-263 204-351 540-460 837-93 254-60 534 4 791 65 263 95 537 278 757 174 210 265 467 450 678 162 184 220 446 402 621l119 199 124 145 92 82">
            <text:p/>
          </draw:path>
        </draw:g>
        <draw:g draw:style-name="gr1" xml:id="id7" draw:id="id7">
          <draw:path draw:style-name="gr12" draw:text-style-name="P8" draw:layer="layout" svg:width="0.572cm" svg:height="1.419cm" svg:x="17.031cm" svg:y="7.921cm" svg:viewBox="0 0 573 1420" svg:d="M269 1420c-91-255-180-509-229-702-48-193-55-324-10-455s142-261 244-263 208 123 261 253c52 131 50 267-3 462-53 196-158 451-263 705z">
            <text:p/>
          </draw:path>
          <draw:path draw:style-name="gr13" draw:text-style-name="P8" draw:layer="layout" svg:width="0.572cm" svg:height="1.419cm" svg:x="17.022cm" svg:y="9.338cm" svg:viewBox="0 0 573 1420" svg:d="M269 0c-90 255-181 509-229 703-48 193-55 324-10 455 45 130 142 260 244 262 102 3 208-122 261-253 52-130 50-267-3-462s-158-450-263-705z">
            <text:p/>
          </draw:path>
          <draw:line draw:style-name="gr14" draw:text-style-name="P9" draw:layer="layout" svg:x1="12.997cm" svg:y1="10.136cm" svg:x2="12.992cm" svg:y2="8.49cm">
            <text:p/>
          </draw:line>
          <draw:line draw:style-name="gr14" draw:text-style-name="P9" draw:layer="layout" svg:x1="15.038cm" svg:y1="7.645cm" svg:x2="17.3cm" svg:y2="9.338cm">
            <text:p/>
          </draw:line>
          <draw:line draw:style-name="gr14" draw:text-style-name="P9" draw:layer="layout" svg:x1="15.041cm" svg:y1="10.947cm" svg:x2="17.3cm" svg:y2="9.338cm">
            <text:p/>
          </draw:line>
          <draw:line draw:style-name="gr14" draw:text-style-name="P9" draw:layer="layout" svg:x1="19.736cm" svg:y1="8.491cm" svg:x2="19.719cm" svg:y2="10.149cm">
            <text:p/>
          </draw:line>
          <draw:line draw:style-name="gr15" draw:text-style-name="P9" draw:layer="layout" svg:x1="12.997cm" svg:y1="10.135cm" svg:x2="15.041cm" svg:y2="10.946cm">
            <text:p/>
          </draw:line>
          <draw:line draw:style-name="gr15" draw:text-style-name="P9" draw:layer="layout" svg:x1="12.992cm" svg:y1="8.49cm" svg:x2="15.038cm" svg:y2="7.645cm">
            <text:p/>
          </draw:line>
          <draw:line draw:style-name="gr15" draw:text-style-name="P9" draw:layer="layout" svg:x1="17.3cm" svg:y1="9.338cm" svg:x2="19.736cm" svg:y2="8.491cm">
            <text:p/>
          </draw:line>
          <draw:line draw:style-name="gr15" draw:text-style-name="P9" draw:layer="layout" svg:x1="19.719cm" svg:y1="10.149cm" svg:x2="17.3cm" svg:y2="9.338cm">
            <text:p/>
          </draw:line>
          <draw:path draw:style-name="gr16" draw:text-style-name="P10" draw:layer="layout" svg:width="0.367cm" svg:height="0.367cm" svg:x="14.845cm" svg:y="7.483cm" svg:viewBox="0 0 368 368" svg:d="M368 184c0 32-8 64-24 92-17 28-40 51-68 67s-60 25-92 25c-33 0-64-9-92-25s-51-39-67-67-25-60-25-92 9-64 25-92 39-51 67-67 60-25 92-25c33 0 64 9 92 25s51 39 68 67c16 28 24 60 24 92z">
            <text:p/>
          </draw:path>
          <draw:path draw:style-name="gr17" draw:text-style-name="P11" draw:layer="layout" svg:width="0.374cm" svg:height="0.375cm" svg:x="14.854cm" svg:y="10.763cm" svg:viewBox="0 0 375 376" svg:d="M375 188c0 33-9 65-25 94-17 28-41 51-69 68-29 16-62 26-94 26-33 0-65-10-93-26-29-17-53-40-69-68-17-29-25-61-25-94s8-66 25-94c16-29 40-52 69-68 28-17 60-26 93-26 32 0 66 9 94 26 29 16 52 39 69 68 16 28 25 61 25 94z">
            <text:p/>
          </draw:path>
          <draw:path draw:style-name="gr18" draw:text-style-name="P10" draw:layer="layout" svg:width="0.367cm" svg:height="0.366cm" svg:x="12.8cm" svg:y="8.297cm" svg:viewBox="0 0 368 367" svg:d="M368 183c0 33-9 64-25 92s-39 51-67 68c-28 16-60 24-92 24s-64-8-92-24c-28-17-51-40-67-68s-25-59-25-92c0-32 9-64 25-91 16-28 39-52 67-68s60-24 92-24 64 8 92 24 51 40 67 68c16 27 25 59 25 91z">
            <text:p/>
          </draw:path>
          <draw:path draw:style-name="gr18" draw:text-style-name="P10" draw:layer="layout" svg:width="0.367cm" svg:height="0.366cm" svg:x="12.8cm" svg:y="9.955cm" svg:viewBox="0 0 368 367" svg:d="M368 183c0 33-9 64-25 92s-39 51-67 68c-28 16-60 24-92 24s-64-8-92-24c-28-17-51-40-67-68s-25-59-25-92c0-32 9-64 25-91 16-28 39-52 67-68s60-24 92-24 64 8 92 24 51 40 67 68c16 27 25 59 25 91z">
            <text:p/>
          </draw:path>
          <draw:path draw:style-name="gr18" draw:text-style-name="P10" draw:layer="layout" svg:width="0.367cm" svg:height="0.366cm" svg:x="19.532cm" svg:y="8.297cm" svg:viewBox="0 0 368 367" svg:d="M368 183c0 33-9 64-25 92-17 28-39 51-67 68-28 16-60 24-92 24-33 0-64-8-92-24-28-17-51-40-67-68s-25-59-25-92c0-32 9-64 25-91 16-28 39-52 67-68s60-24 92-24c33 0 64 8 92 24s51 40 67 68c17 27 25 59 25 91z">
            <text:p/>
          </draw:path>
          <draw:path draw:style-name="gr18" draw:text-style-name="P10" draw:layer="layout" svg:width="0.367cm" svg:height="0.366cm" svg:x="19.532cm" svg:y="9.955cm" svg:viewBox="0 0 368 367" svg:d="M368 183c0 33-9 64-25 92-17 28-39 51-67 68-28 16-60 24-92 24-33 0-64-8-92-24-28-17-51-40-67-68s-25-59-25-92c0-32 9-64 25-91 16-28 39-52 67-68s60-24 92-24c33 0 64 8 92 24s51 40 67 68c17 27 25 59 25 91z">
            <text:p/>
          </draw:path>
          <draw:path draw:style-name="gr18" draw:text-style-name="P10" draw:layer="layout" svg:width="0.305cm" svg:height="0.511cm" svg:x="20.074cm" svg:y="9.964cm" svg:viewBox="0 0 306 512" svg:d="M59 453l82-79c120-106 165-147 165-225 0-87-68-149-162-149-87 0-144 71-144 140 0 42 39 42 41 42 13 0 40-8 40-41 0-19-14-40-41-40-6 0-7 0-10 1 17-50 59-78 104-78 70 0 102 63 102 125s-37 122-80 170l-147 164c-9 9-9 11-9 29h286l20-134h-18c-4 23-9 57-18 69-5 6-55 6-72 6z">
            <text:p/>
          </draw:path>
          <draw:path draw:style-name="gr18" draw:text-style-name="P10" draw:layer="layout" svg:width="0.18cm" svg:height="0.34cm" svg:x="20.442cm" svg:y="10.255cm" svg:viewBox="0 0 181 341" svg:d="M110 124h54c11 0 17 0 17-12 0-7-6-7-16-7h-51l20-80c1-2 2-6 2-7 0-11-8-18-19-18-13 0-21 10-25 23-4 15 3-12-21 82h-54c-10 0-17 0-17 12 0 7 6 7 16 7h50l-31 127c-4 13-9 32-9 40 0 31 28 50 58 50 61 0 94-75 94-82s-7-7-8-7c-7 0-7 1-12 11-15 34-42 64-71 64-12 0-20-8-20-27 0-5 3-17 4-21z">
            <text:p/>
          </draw:path>
          <draw:path draw:style-name="gr18" draw:text-style-name="P10" draw:layer="layout" svg:width="0.252cm" svg:height="0.511cm" svg:x="14.721cm" svg:y="7.986cm" svg:viewBox="0 0 253 512" svg:d="M158 21c0-20 0-21-18-21-48 50-116 50-140 50v24c16 0 60 0 100-21v399c0 28-2 36-71 36h-24v24c27-2 93-2 124-2 30 0 98 0 124 2v-24h-24c-70 0-71-8-71-36z">
            <text:p/>
          </draw:path>
          <draw:path draw:style-name="gr18" draw:text-style-name="P10" draw:layer="layout" svg:width="0.18cm" svg:height="0.34cm" svg:x="15.06cm" svg:y="8.277cm" svg:viewBox="0 0 181 341" svg:d="M109 124h55c10 0 17 0 17-12 0-7-7-7-16-7h-51l19-79c2-3 3-6 3-8 0-10-9-18-19-18-14 0-21 10-26 23-3 15 4-12-20 82h-54c-10 0-17 0-17 12 0 7 6 7 15 7h51l-31 127c-4 13-9 32-9 40 0 31 28 50 58 50 60 0 94-75 94-82 0-8-7-7-8-7-8 0-8 1-12 11-15 34-43 64-72 64-12 0-19-7-19-27 0-5 3-17 4-21z">
            <text:p/>
          </draw:path>
          <draw:path draw:style-name="gr18" draw:text-style-name="P10" draw:layer="layout" svg:width="0.339cm" svg:height="0.52cm" svg:x="12.624cm" svg:y="7.518cm" svg:viewBox="0 0 340 521" svg:d="M205 394v66c0 28-2 36-59 36h-15v25c31-3 70-3 103-3 32 0 73 0 105 3v-25h-17c-56 0-58-8-58-36v-66h76v-24h-76v-350c0-15 0-20-13-20-6 0-8 0-14 10l-237 360v24zM209 370h-187l187-287z">
            <text:p/>
          </draw:path>
          <draw:path draw:style-name="gr18" draw:text-style-name="P10" draw:layer="layout" svg:width="0.18cm" svg:height="0.34cm" svg:x="13.01cm" svg:y="7.818cm" svg:viewBox="0 0 181 341" svg:d="M110 124h54c11 0 17 0 17-12 0-8-6-8-16-8h-51l20-79c1-3 2-6 2-7 0-11-8-18-19-18-13 0-21 9-25 22-4 15 3-12-21 82h-54c-10 0-17 0-17 12 0 8 6 8 16 8h50l-31 126c-4 13-8 33-8 40 0 31 27 51 57 51 61 0 94-75 94-82 0-8-7-8-8-8-7 0-7 2-12 11-15 34-42 64-71 64-12 0-20-7-20-26 0-5 3-17 4-22z">
            <text:p/>
          </draw:path>
          <draw:path draw:style-name="gr18" draw:text-style-name="P10" draw:layer="layout" svg:width="0.252cm" svg:height="0.511cm" svg:x="20.015cm" svg:y="8.135cm" svg:viewBox="0 0 253 512" svg:d="M158 20c0-19 0-20-18-20-49 49-116 49-140 49v24c16 0 60 0 100-20v398c0 28-2 37-71 37h-24v24c26-3 93-3 124-3 30 0 97 0 124 3v-24h-24c-70 0-71-9-71-37z">
            <text:p/>
          </draw:path>
          <draw:path draw:style-name="gr18" draw:text-style-name="P10" draw:layer="layout" svg:width="0.293cm" svg:height="0.378cm" svg:x="20.369cm" svg:y="8.388cm" svg:viewBox="0 0 294 379" svg:d="M129 17c0-1 1-8 1-8 0-4-1-9-8-9-11 0-55 5-69 6-3 0-12 2-12 12 0 8 9 8 15 8 25 0 25 4 25 8s-1 7-1 12l-76 304c-4 9-4 11-4 12 0 8 7 17 20 17 6 0 15-3 21-14 1-3 6-23 9-33l13-49c1-8 7-28 8-36 5-20 5-21 16-38 18-27 45-57 87-57 30 0 31 24 31 37 0 33-23 92-31 115-6 16-9 20-9 29 0 29 24 46 51 46 54 0 78-74 78-82s-7-8-9-8c-8 0-8 4-10 10-12 43-36 65-57 65-12 0-14-7-14-19s4-19 13-43c6-17 28-74 28-104 0-9 0-31-19-47-10-6-26-15-51-15-39 0-67 22-87 45z">
            <text:p/>
          </draw:path>
          <draw:path draw:style-name="gr18" draw:text-style-name="P10" draw:layer="layout" svg:width="0.305cm" svg:height="0.528cm" svg:x="14.519cm" svg:y="9.969cm" svg:viewBox="0 0 306 529" svg:d="M306 358c0-92-63-169-146-169-36 0-70 12-98 40v-151c16 5 41 10 65 10 96 0 150-70 150-79 0-5-2-9-9-9 0 0-2 0-6 2-15 8-53 23-104 23-31 0-67-6-103-21-6-3-7-3-8-3-9 0-9 6-9 18v228c0 13 0 19 11 19 6 0 7-1 11-6 8-12 36-54 99-54 40 0 59 35 65 50 12 28 14 57 14 96 0 28 0 73-19 106-18 30-47 49-82 49-55 0-100-41-113-85 2 0 5 1 13 1 25 0 39-19 39-37 0-20-14-39-39-39-11 0-37 6-37 41 0 66 53 141 138 141 90 0 168-73 168-171z">
            <text:p/>
          </draw:path>
          <draw:path draw:style-name="gr18" draw:text-style-name="P10" draw:layer="layout" svg:width="0.293cm" svg:height="0.377cm" svg:x="14.904cm" svg:y="10.223cm" svg:viewBox="0 0 294 378" svg:d="M129 17c0-1 1-9 1-9 0-3-1-8-8-8-11 0-55 5-69 6-3 0-12 1-12 12 0 7 9 7 15 7 25 0 25 5 25 9 0 3-1 7-1 12l-76 303c-4 10-4 11-4 12 0 9 7 17 20 17 6 0 15-2 21-13 1-4 6-23 9-34l13-48c1-8 7-29 8-36 5-21 5-22 16-39 18-26 45-56 87-56 30 0 31 24 31 37 0 33-23 92-31 114-6 16-9 21-9 29 0 29 24 46 51 46 54 0 78-73 78-82 0-7-7-7-9-7-8 0-8 4-10 10-12 43-36 65-57 65-12 0-14-8-14-20s4-19 13-43c6-17 28-73 28-104 0-8 0-31-19-47-10-6-26-14-51-14-39 0-68 22-87 45z">
            <text:p/>
          </draw:path>
          <draw:path draw:style-name="gr18" draw:text-style-name="P10" draw:layer="layout" svg:width="0.318cm" svg:height="0.528cm" svg:x="12.369cm" svg:y="10.205cm" svg:viewBox="0 0 319 529" svg:d="M190 241c63-20 107-73 107-135 0-63-67-106-141-106-77 0-136 46-136 105 0 25 17 40 40 40s38-17 38-40c0-37-36-37-47-37 23-39 74-49 102-49 32 0 74 17 74 86 0 10-2 54-21 88-23 37-50 40-69 40-6 1-24 2-30 2-6 1-11 2-11 10s5 8 18 8h34c63 0 91 52 91 128 0 105-53 126-86 126-34 0-92-13-118-58 26 4 50-13 50-42 0-27-20-43-42-43-19 0-43 11-43 45 0 69 71 120 155 120 94 0 164-70 164-148 0-63-49-123-129-140z">
            <text:p/>
          </draw:path>
          <draw:path draw:style-name="gr18" draw:text-style-name="P10" draw:layer="layout" svg:width="0.293cm" svg:height="0.377cm" svg:x="12.76cm" svg:y="10.459cm" svg:viewBox="0 0 294 378" svg:d="M129 17c0-1 1-9 1-9 0-3-1-8-8-8-11 0-56 5-69 6-3 0-12 1-12 12 0 7 9 7 15 7 25 0 25 5 25 9 0 3-1 7-1 12l-76 303c-4 10-4 11-4 12 0 9 7 17 19 17 6 0 16-2 22-13 1-4 6-23 9-34l13-48c1-8 7-29 8-36 5-21 5-22 16-39 18-26 45-56 87-56 30 0 31 24 31 37 0 33-23 92-31 114-6 16-9 21-9 29 0 29 24 46 51 46 54 0 78-73 78-82 0-7-7-7-9-7-8 0-8 4-10 10-12 43-36 65-57 65-12 0-14-8-14-20s3-19 13-43c6-17 28-73 28-104 0-8 0-31-19-47-10-6-26-14-51-14-39 0-68 22-87 45z">
            <text:p/>
          </draw:path>
          <draw:path draw:style-name="gr18" draw:text-style-name="P10" draw:layer="layout" svg:width="0.374cm" svg:height="0.375cm" svg:x="14.852cm" svg:y="10.769cm" svg:viewBox="0 0 375 376" svg:d="M375 188c0 33-9 65-25 94-17 28-41 51-69 68-29 16-62 26-94 26-33 0-65-10-93-26-29-17-53-40-69-68-17-29-25-61-25-94s8-65 25-94c16-28 40-52 69-68 28-17 61-26 93-26 33 0 65 9 94 26 28 16 52 40 69 68 16 29 25 61 25 94z">
            <text:p/>
          </draw:path>
        </draw:g>
        <draw:frame presentation:style-name="pr1" draw:layer="layout" svg:width="26.491cm" svg:height="1.881cm" svg:x="0.399cm" svg:y="0.159cm" presentation:class="title">
          <draw:text-box>
            <text:p>Simple cycle types</text:p>
          </draw:text-box>
        </draw:frame>
        <draw:frame presentation:style-name="pr3" draw:text-style-name="P12" draw:layer="layout" svg:width="8.004cm" svg:height="8.345cm" svg:x="1.399cm" svg:y="4.784cm" presentation:class="outline" presentation:user-transformed="true">
          <draw:text-box>
            <text:list text:style-name="L4">
              <text:list-item>
                <text:p xml:id="id4" text:id="id4"><text:span text:style-name="T4">Balanced</text:span></text:p>
              </text:list-item>
            </text:list>
            <text:list text:style-name="L1">
              <text:list-item>
                <text:list>
                  <text:list-item>
                    <text:p xml:id="id5" text:id="id5"><text:span text:style-name="T4">complete</text:span><text:span text:style-name="T4"><text:line-break/></text:span><text:span text:style-name="T4">(</text:span><text:span text:style-name="T5">c </text:span><text:span text:style-name="T6"><text:s/>= 1</text:span><text:span text:style-name="T4">)</text:span></text:p>
                  </text:list-item>
                  <text:list-item>
                    <text:p xml:id="id6" text:id="id6"><text:span text:style-name="T4">incomplete</text:span><text:span text:style-name="T4"><text:line-break/></text:span><text:span text:style-name="T4">(</text:span><text:span text:style-name="T5">i </text:span><text:span text:style-name="T6"><text:s/>= 2</text:span><text:span text:style-name="T4">)</text:span></text:p>
                  </text:list-item>
                </text:list>
              </text:list-item>
            </text:list>
            <text:list text:style-name="L4">
              <text:list-item>
                <text:p xml:id="id11" text:id="id11"><text:span text:style-name="T4">Unbalanced</text:span></text:p>
              </text:list-item>
            </text:list>
          </draw:text-box>
        </draw:frame>
        <draw:g draw:style-name="gr1" xml:id="id10" draw:id="id10">
          <draw:line draw:style-name="gr15" draw:text-style-name="P9" draw:layer="layout" svg:x1="10.545cm" svg:y1="9.234cm" svg:x2="11.639cm" svg:y2="6.513cm">
            <text:p/>
          </draw:line>
          <draw:line draw:style-name="gr15" draw:text-style-name="P9" draw:layer="layout" svg:x1="14.901cm" svg:y1="6.517cm" svg:x2="17.323cm" svg:y2="9.284cm">
            <text:p/>
          </draw:line>
          <draw:line draw:style-name="gr15" draw:text-style-name="P9" draw:layer="layout" svg:x1="14.907cm" svg:y1="12.02cm" svg:x2="11.638cm" svg:y2="12.009cm">
            <text:p/>
          </draw:line>
          <draw:line draw:style-name="gr15" draw:text-style-name="P9" draw:layer="layout" svg:x1="17.324cm" svg:y1="9.284cm" svg:x2="19.783cm" svg:y2="6.527cm">
            <text:p/>
          </draw:line>
          <draw:line draw:style-name="gr15" draw:text-style-name="P9" draw:layer="layout" svg:x1="23.045cm" svg:y1="6.527cm" svg:x2="24.142cm" svg:y2="9.243cm">
            <text:p/>
          </draw:line>
          <draw:line draw:style-name="gr15" draw:text-style-name="P9" draw:layer="layout" svg:x1="23.048cm" svg:y1="12.009cm" svg:x2="19.802cm" svg:y2="12.021cm">
            <text:p/>
          </draw:line>
          <draw:line draw:style-name="gr14" draw:text-style-name="P9" draw:layer="layout" svg:x1="10.545cm" svg:y1="9.234cm" svg:x2="11.639cm" svg:y2="12.011cm">
            <text:p/>
          </draw:line>
          <draw:line draw:style-name="gr14" draw:text-style-name="P9" draw:layer="layout" svg:x1="14.901cm" svg:y1="12.012cm" svg:x2="17.323cm" svg:y2="9.284cm">
            <text:p/>
          </draw:line>
          <draw:line draw:style-name="gr14" draw:text-style-name="P9" draw:layer="layout" svg:x1="19.803cm" svg:y1="12.023cm" svg:x2="17.324cm" svg:y2="9.284cm">
            <text:p/>
          </draw:line>
          <draw:line draw:style-name="gr14" draw:text-style-name="P9" draw:layer="layout" svg:x1="23.048cm" svg:y1="12.011cm" svg:x2="24.142cm" svg:y2="9.243cm">
            <text:p/>
          </draw:line>
          <draw:line draw:style-name="gr14" draw:text-style-name="P9" draw:layer="layout" svg:x1="23.045cm" svg:y1="6.527cm" svg:x2="19.782cm" svg:y2="6.527cm">
            <text:p/>
          </draw:line>
          <draw:line draw:style-name="gr14" draw:text-style-name="P9" draw:layer="layout" svg:x1="11.638cm" svg:y1="6.513cm" svg:x2="14.903cm" svg:y2="6.513cm">
            <text:p/>
          </draw:line>
          <draw:path draw:style-name="gr19" draw:text-style-name="P9" draw:layer="layout" svg:width="0.366cm" svg:height="1.688cm" svg:x="25.911cm" svg:y="8.427cm" svg:viewBox="0 0 367 1689" svg:d="M366 1689c-824-924 1-1689 1-1689">
            <text:p/>
          </draw:path>
          <draw:path draw:style-name="gr18" draw:text-style-name="P10" draw:layer="layout" svg:width="0.374cm" svg:height="0.375cm" svg:x="14.713cm" svg:y="11.822cm" svg:viewBox="0 0 375 376" svg:d="M375 188c0 33-9 65-25 94-17 28-40 51-68 68-29 16-61 26-94 26s-66-10-94-26c-29-17-52-40-69-68-17-29-25-61-25-94s9-65 25-94c17-28 40-52 69-68 28-17 61-26 94-26s65 9 94 26c28 16 52 40 68 68 17 29 25 61 25 94z">
            <text:p/>
          </draw:path>
          <draw:path draw:style-name="gr17" draw:text-style-name="P11" draw:layer="layout" svg:width="0.374cm" svg:height="0.375cm" svg:x="14.713cm" svg:y="11.822cm" svg:viewBox="0 0 375 376" svg:d="M375 188c0 33-9 65-25 94-17 28-40 51-68 68-29 16-61 26-94 26s-66-10-94-26c-29-17-52-40-69-68-17-29-25-61-25-94s8-66 25-94c17-29 40-52 69-68 28-17 61-26 94-26s65 9 94 26c28 16 51 39 68 68 16 28 25 61 25 94z">
            <text:p/>
          </draw:path>
          <draw:path draw:style-name="gr18" draw:text-style-name="P10" draw:layer="layout" svg:width="0.374cm" svg:height="0.375cm" svg:x="11.455cm" svg:y="11.822cm" svg:viewBox="0 0 375 376" svg:d="M375 188c0 33-9 65-25 94-17 28-41 51-69 68-29 16-61 26-94 26s-65-10-93-26c-29-17-53-40-69-68-17-29-25-61-25-94s8-65 25-94c16-28 40-52 69-68 28-17 60-26 93-26s65 9 94 26c28 16 52 40 69 68 16 29 25 61 25 94z">
            <text:p/>
          </draw:path>
          <draw:path draw:style-name="gr17" draw:text-style-name="P11" draw:layer="layout" svg:width="0.374cm" svg:height="0.375cm" svg:x="11.455cm" svg:y="11.822cm" svg:viewBox="0 0 375 376" svg:d="M375 188c0 33-9 65-25 94-17 28-41 51-69 68-29 16-61 26-94 26s-65-10-93-26c-29-17-53-40-69-68-17-29-25-61-25-94s8-66 25-94c16-29 40-52 69-68 28-17 60-26 93-26s66 9 94 26c29 16 52 39 69 68 16 28 25 61 25 94z">
            <text:p/>
          </draw:path>
          <draw:path draw:style-name="gr18" draw:text-style-name="P10" draw:layer="layout" svg:width="0.374cm" svg:height="0.374cm" svg:x="14.713cm" svg:y="6.329cm" svg:viewBox="0 0 375 375" svg:d="M375 188c0 32-9 64-25 93-17 28-40 53-68 69-29 16-61 25-94 25s-66-9-94-25c-29-16-53-41-69-69-17-29-25-61-25-93 0-33 9-66 25-94 17-29 40-53 69-69 28-17 61-25 94-25s65 8 94 25c28 16 52 40 68 69 17 28 25 61 25 94z">
            <text:p/>
          </draw:path>
          <draw:path draw:style-name="gr17" draw:text-style-name="P11" draw:layer="layout" svg:width="0.374cm" svg:height="0.374cm" svg:x="14.713cm" svg:y="6.329cm" svg:viewBox="0 0 375 375" svg:d="M375 188c0 32-9 64-25 93-17 28-40 53-68 69-29 16-61 25-94 25s-66-9-94-25c-29-16-53-41-69-69-17-29-25-61-25-93 0-33 8-66 25-94 16-29 40-53 69-69 28-17 61-25 94-25s65 8 94 25c28 16 51 40 68 69 16 28 25 61 25 94z">
            <text:p/>
          </draw:path>
          <draw:path draw:style-name="gr18" draw:text-style-name="P10" draw:layer="layout" svg:width="0.374cm" svg:height="0.374cm" svg:x="11.455cm" svg:y="6.329cm" svg:viewBox="0 0 375 375" svg:d="M375 188c0 32-9 64-25 93-17 28-41 53-69 69-29 16-61 25-94 25s-65-9-93-25c-29-16-52-41-69-69-17-29-25-61-25-93 0-33 8-66 25-94 16-29 40-53 69-69 28-17 60-25 93-25s65 8 94 25c28 16 52 40 69 69 16 28 25 61 25 94z">
            <text:p/>
          </draw:path>
          <draw:path draw:style-name="gr17" draw:text-style-name="P11" draw:layer="layout" svg:width="0.374cm" svg:height="0.374cm" svg:x="11.455cm" svg:y="6.329cm" svg:viewBox="0 0 375 375" svg:d="M375 188c0 32-9 64-25 93-17 28-41 53-69 69-29 16-61 25-94 25s-65-9-93-25c-29-16-52-41-69-69-17-29-25-61-25-93 0-33 8-66 25-94 17-29 40-53 69-69 28-17 60-25 93-25s65 8 94 25c28 16 52 40 69 69 16 28 25 61 25 94z">
            <text:p/>
          </draw:path>
          <draw:path draw:style-name="gr18" draw:text-style-name="P10" draw:layer="layout" svg:width="0.374cm" svg:height="0.374cm" svg:x="10.355cm" svg:y="9.048cm" svg:viewBox="0 0 375 375" svg:d="M375 187c0 33-9 65-25 94-17 28-41 52-69 69-29 16-60 25-93 25s-66-9-94-25c-29-17-52-41-69-69-17-29-25-61-25-94s9-65 25-94c17-28 40-52 69-68 28-17 61-25 94-25s64 8 93 25c28 16 53 40 69 68 17 29 25 61 25 94z">
            <text:p/>
          </draw:path>
          <draw:path draw:style-name="gr17" draw:text-style-name="P11" draw:layer="layout" svg:width="0.374cm" svg:height="0.374cm" svg:x="10.355cm" svg:y="9.048cm" svg:viewBox="0 0 375 375" svg:d="M375 187c0 33-9 65-25 94-17 28-41 52-69 69-29 16-60 25-93 25s-66-9-94-25c-29-17-52-41-69-69-17-29-25-61-25-94s8-66 25-94c17-29 40-52 69-68 28-17 61-25 94-25s65 8 93 25c29 16 52 39 69 68 16 28 25 61 25 94z">
            <text:p/>
          </draw:path>
          <draw:path draw:style-name="gr18" draw:text-style-name="P10" draw:layer="layout" svg:width="0.375cm" svg:height="0.375cm" svg:x="19.596cm" svg:y="11.822cm" svg:viewBox="0 0 376 376" svg:d="M0 188c0 33 8 65 25 94 17 28 40 51 69 68 28 16 61 26 94 26s65-10 94-26c28-17 52-40 69-68 16-29 25-61 25-94s-9-65-25-94c-17-28-41-52-69-68-29-17-61-26-94-26s-66 9-94 26c-29 16-52 40-69 68-16 29-25 61-25 94z">
            <text:p/>
          </draw:path>
          <draw:path draw:style-name="gr17" draw:text-style-name="P11" draw:layer="layout" svg:width="0.375cm" svg:height="0.375cm" svg:x="19.596cm" svg:y="11.822cm" svg:viewBox="0 0 376 376" svg:d="M0 188c0 33 8 65 25 94 17 28 40 51 69 68 28 16 61 26 94 26s65-10 94-26c28-17 52-40 69-68 16-29 25-61 25-94s-9-66-25-94c-17-29-41-52-69-68-29-17-61-26-94-26s-65 9-94 26c-28 16-52 39-69 68-17 28-25 61-25 94z">
            <text:p/>
          </draw:path>
          <draw:path draw:style-name="gr18" draw:text-style-name="P10" draw:layer="layout" svg:width="0.374cm" svg:height="0.375cm" svg:x="22.855cm" svg:y="11.822cm" svg:viewBox="0 0 375 376" svg:d="M0 188c0 33 8 65 25 94 16 28 40 51 69 68 28 16 60 26 93 26s65-10 94-26c28-17 52-40 69-68 16-29 25-61 25-94s-9-65-25-94c-17-28-41-52-69-68-29-17-61-26-94-26s-65 9-93 26c-29 16-53 40-69 68-17 29-25 61-25 94z">
            <text:p/>
          </draw:path>
          <draw:path draw:style-name="gr17" draw:text-style-name="P11" draw:layer="layout" svg:width="0.374cm" svg:height="0.375cm" svg:x="22.855cm" svg:y="11.822cm" svg:viewBox="0 0 375 376" svg:d="M0 188c0 33 8 65 25 94 16 28 40 51 69 68 28 16 60 26 93 26s65-10 94-26c28-17 52-40 69-68 16-29 25-61 25-94s-9-66-25-94c-17-29-41-52-69-68-29-17-61-26-94-26s-65 9-93 26c-29 16-53 39-69 68-17 28-25 61-25 94z">
            <text:p/>
          </draw:path>
          <draw:path draw:style-name="gr18" draw:text-style-name="P10" draw:layer="layout" svg:width="0.375cm" svg:height="0.374cm" svg:x="23.954cm" svg:y="9.048cm" svg:viewBox="0 0 376 375" svg:d="M0 187c0 33 9 65 26 94 16 28 39 52 68 69 28 16 61 25 94 25s65-9 94-25c28-17 52-41 69-69 16-29 25-61 25-94s-9-65-25-94c-17-28-41-52-69-68-29-17-61-25-94-25s-66 8-94 25c-29 16-52 40-68 68-17 29-26 61-26 94z">
            <text:p/>
          </draw:path>
          <draw:path draw:style-name="gr17" draw:text-style-name="P11" draw:layer="layout" svg:width="0.375cm" svg:height="0.374cm" svg:x="23.954cm" svg:y="9.048cm" svg:viewBox="0 0 376 375" svg:d="M0 187c0 33 9 65 26 94 16 28 39 52 68 69 28 16 61 25 94 25s65-9 94-25c28-17 52-41 69-69 16-29 25-61 25-94s-9-66-25-94c-17-29-41-52-69-68-29-17-61-25-94-25s-65 8-94 25c-28 16-52 39-68 68-17 28-26 61-26 94z">
            <text:p/>
          </draw:path>
          <draw:path draw:style-name="gr18" draw:text-style-name="P10" draw:layer="layout" svg:width="0.375cm" svg:height="0.374cm" svg:x="19.596cm" svg:y="6.329cm" svg:viewBox="0 0 376 375" svg:d="M0 188c0 32 8 64 25 93 16 28 40 53 69 69 28 16 61 25 94 25s65-9 94-25c28-16 52-41 69-69 16-29 25-61 25-93 0-33-9-66-25-94-17-29-41-53-69-69-29-17-61-25-94-25s-66 8-94 25c-29 16-52 40-69 69-16 28-25 61-25 94z">
            <text:p/>
          </draw:path>
          <draw:path draw:style-name="gr17" draw:text-style-name="P11" draw:layer="layout" svg:width="0.375cm" svg:height="0.374cm" svg:x="19.596cm" svg:y="6.329cm" svg:viewBox="0 0 376 375" svg:d="M0 188c0 32 8 64 25 93 16 28 40 53 69 69 28 16 61 25 94 25s65-9 94-25c28-16 52-41 69-69 16-29 25-61 25-93 0-33-9-66-25-94-17-29-41-53-69-69-29-17-61-25-94-25s-66 8-94 25c-29 16-53 40-69 69-17 28-25 61-25 94z">
            <text:p/>
          </draw:path>
          <draw:path draw:style-name="gr18" draw:text-style-name="P10" draw:layer="layout" svg:width="0.374cm" svg:height="0.375cm" svg:x="22.855cm" svg:y="6.343cm" svg:viewBox="0 0 375 376" svg:d="M0 188c0 33 8 65 25 94 16 28 40 51 69 68 28 16 60 26 93 26s65-10 94-26c28-17 52-40 69-68 16-29 25-61 25-94s-9-65-25-94c-17-28-41-52-69-68-29-17-61-26-94-26s-65 9-93 26c-29 16-53 40-69 68-17 29-25 61-25 94z">
            <text:p/>
          </draw:path>
          <draw:path draw:style-name="gr17" draw:text-style-name="P11" draw:layer="layout" svg:width="0.374cm" svg:height="0.375cm" svg:x="22.855cm" svg:y="6.343cm" svg:viewBox="0 0 375 376" svg:d="M0 188c0 33 8 65 25 94 16 28 40 51 69 68 28 16 60 26 93 26s65-10 94-26c28-17 52-40 69-68 16-29 25-61 25-94s-9-66-25-94c-17-29-41-52-69-68-29-17-61-26-94-26s-65 9-93 26c-29 16-53 39-69 68-17 28-25 61-25 94z">
            <text:p/>
          </draw:path>
          <draw:path draw:style-name="gr20" draw:text-style-name="P9" draw:layer="layout" svg:width="0.366cm" svg:height="1.688cm" svg:x="26.276cm" svg:y="8.427cm" svg:viewBox="0 0 367 1689" svg:d="M1 1689c825-924-1-1689-1-1689">
            <text:p/>
          </draw:path>
          <draw:path draw:style-name="gr21" draw:text-style-name="P10" draw:layer="layout" svg:width="0.367cm" svg:height="0.366cm" svg:x="26.093cm" svg:y="8.243cm" svg:viewBox="0 0 368 367" svg:d="M368 183c0 33-9 64-25 92-17 28-39 51-67 68-28 16-60 24-92 24s-64-8-92-24c-28-17-51-40-67-68s-25-59-25-92c0-32 9-64 25-91 16-28 39-52 67-68s60-24 92-24 64 8 92 24 51 40 67 68c17 27 25 59 25 91z">
            <text:p/>
          </draw:path>
          <draw:path draw:style-name="gr22" draw:text-style-name="P11" draw:layer="layout" svg:width="0.367cm" svg:height="0.366cm" svg:x="26.093cm" svg:y="8.243cm" svg:viewBox="0 0 368 367" svg:d="M368 183c0 32-9 64-25 92-17 28-39 51-67 68-28 16-60 24-92 24s-64-8-92-24c-28-17-51-40-67-68s-25-60-25-92c0-33 9-64 25-91 16-28 39-52 67-68s60-24 92-24 64 8 92 24 50 40 67 68c16 27 25 58 25 91z">
            <text:p/>
          </draw:path>
          <draw:path draw:style-name="gr18" draw:text-style-name="P10" draw:layer="layout" svg:width="0.367cm" svg:height="0.366cm" svg:x="26.093cm" svg:y="9.901cm" svg:viewBox="0 0 368 367" svg:d="M368 183c0 33-9 64-25 92-17 28-39 51-67 68-28 16-60 24-92 24s-64-8-92-24c-28-17-51-40-67-68s-25-59-25-92c0-32 9-64 25-91 16-28 39-52 67-68s60-24 92-24 64 8 92 24 51 40 67 68c17 27 25 59 25 91z">
            <text:p/>
          </draw:path>
          <draw:path draw:style-name="gr22" draw:text-style-name="P11" draw:layer="layout" svg:width="0.367cm" svg:height="0.366cm" svg:x="26.093cm" svg:y="9.901cm" svg:viewBox="0 0 368 367" svg:d="M368 183c0 32-9 64-25 92-17 28-39 51-67 68-28 16-60 24-92 24s-64-8-92-24c-28-17-51-40-67-68s-25-60-25-92c0-33 9-64 25-91 16-28 39-52 67-68s60-24 92-24 64 8 92 24 50 40 67 68c16 27 25 58 25 91z">
            <text:p/>
          </draw:path>
          <draw:path draw:style-name="gr18" draw:text-style-name="P10" draw:layer="layout" svg:width="0.328cm" svg:height="0.535cm" svg:x="9.883cm" svg:y="9.372cm" svg:viewBox="0 0 329 536" svg:d="M323 50c6-8 6-9 6-26h-187c-93 0-95-10-98-24h-19l-25 157h19c2-12 8-60 19-69 5-5 65-5 75-5h159c-8 12-69 96-85 121-70 104-96 211-96 290 0 7 0 42 36 42 35 0 35-35 35-42v-40c0-42 3-84 9-125 3-19 13-85 48-132z">
            <text:p/>
          </draw:path>
          <draw:path draw:style-name="gr18" draw:text-style-name="P10" draw:layer="layout" svg:width="0.294cm" svg:height="0.377cm" svg:x="10.263cm" svg:y="9.633cm" svg:viewBox="0 0 295 378" svg:d="M129 16c0-1 2-8 2-8 0-4-2-8-9-8-11 0-55 4-69 6-3 0-12 1-12 12 0 7 9 7 15 7 25 0 25 4 25 8 0 3-1 8-1 12l-76 304c-4 10-4 11-4 12 0 9 8 17 20 17 6 0 15-2 21-13 2-4 6-23 9-34l13-48c1-9 7-29 9-36 4-21 4-22 15-39 18-26 45-57 87-57 30 0 31 25 31 38 0 32-23 91-31 114-6 16-8 21-8 29 0 29 24 46 50 46 54 0 79-74 79-82 0-7-8-7-10-7-7 0-7 3-10 9-12 44-36 65-56 65-12 0-15-7-15-19s4-19 13-43c6-17 28-74 28-104 0-8 0-31-19-47-10-6-26-14-51-14-38 0-67 21-87 44z">
            <text:p/>
          </draw:path>
          <draw:path draw:style-name="gr18" draw:text-style-name="P10" draw:layer="layout" svg:width="0.318cm" svg:height="0.528cm" svg:x="10.721cm" svg:y="11.729cm" svg:viewBox="0 0 319 529" svg:d="M93 160c-35-22-39-48-39-61 0-47 51-80 105-80 56 0 105 40 105 96 0 44-30 80-76 107zM205 234c55-29 93-69 93-119 0-71-68-115-138-115-77 0-140 57-140 129 0 13 2 48 34 84 9 9 38 28 57 41-45 23-111 65-111 143 0 80 78 132 159 132 87 0 160-64 160-146 0-27-8-62-38-95-15-16-27-23-76-54zM128 266l95 61c22 14 58 37 58 84 0 57-58 96-121 96-66 0-121-47-121-110 0-45 24-94 89-131z">
            <text:p/>
          </draw:path>
          <draw:path draw:style-name="gr18" draw:text-style-name="P10" draw:layer="layout" svg:width="0.179cm" svg:height="0.34cm" svg:x="11.096cm" svg:y="12.02cm" svg:viewBox="0 0 180 341" svg:d="M109 124h55c10 0 16 0 16-12 0-7-6-7-15-7h-51l19-79c2-3 3-6 3-8 0-10-9-18-19-18-14 0-21 10-26 23-3 15 4-12-20 82h-54c-10 0-17 0-17 12 0 7 6 7 15 7h51l-31 127c-4 13-9 32-9 40 0 31 28 50 58 50 60 0 94-75 94-82 0-8-7-7-8-7-8 0-8 1-12 11-15 34-43 64-72 64-12 0-19-7-19-27 0-5 3-17 4-21z">
            <text:p/>
          </draw:path>
          <draw:path draw:style-name="gr18" draw:text-style-name="P10" draw:layer="layout" svg:width="0.319cm" svg:height="0.528cm" svg:x="15.479cm" svg:y="11.717cm" svg:viewBox="0 0 320 529" svg:d="M69 261v-20c0-194 95-221 135-221 18 0 51 4 68 31-13 0-43 0-43 34 0 24 18 36 35 36 12 0 36-7 36-38 0-45-33-83-97-83-99 0-203 99-203 269 0 206 90 260 161 260 85 0 159-72 159-173 0-98-69-171-155-171-51 0-80 38-96 76zM161 508c-49 0-71-46-76-58-15-36-15-98-15-111 0-60 26-137 94-137 14 0 48 0 73 48 13 27 13 67 13 105 0 37 0 75-13 103-23 46-58 50-76 50z">
            <text:p/>
          </draw:path>
          <draw:path draw:style-name="gr18" draw:text-style-name="P10" draw:layer="layout" svg:width="0.18cm" svg:height="0.34cm" svg:x="15.854cm" svg:y="12.008cm" svg:viewBox="0 0 181 341" svg:d="M110 125h54c11 0 17 0 17-13 0-7-6-7-16-7h-50l19-79c1-3 2-6 2-8 0-10-8-18-19-18-13 0-21 10-25 23-4 15 3-12-21 82h-54c-10 0-17 0-17 12 0 8 6 8 16 8h50l-31 126c-4 13-8 33-8 40 0 31 27 50 57 50 61 0 94-75 94-82 0-8-7-7-8-7-7 0-7 1-12 11-15 34-42 64-71 64-12 0-19-7-19-27 0-4 2-16 3-21z">
            <text:p/>
          </draw:path>
          <draw:path draw:style-name="gr18" draw:text-style-name="P10" draw:layer="layout" svg:width="0.328cm" svg:height="0.535cm" svg:x="23.476cm" svg:y="11.74cm" svg:viewBox="0 0 329 536" svg:d="M323 50c6-8 6-10 6-26h-187c-93 0-95-10-98-24h-19l-25 157h19c3-12 9-60 19-70 5-4 66-4 75-4h159c-8 12-68 96-85 121-70 104-96 211-96 289 0 8 0 43 37 43 35 0 35-35 35-43v-39c0-42 2-85 8-126 4-18 13-84 48-131z">
            <text:p/>
          </draw:path>
          <draw:path draw:style-name="gr18" draw:text-style-name="P10" draw:layer="layout" svg:width="0.179cm" svg:height="0.34cm" svg:x="23.84cm" svg:y="12.038cm" svg:viewBox="0 0 180 341" svg:d="M109 124h55c10 0 16 0 16-12 0-7-6-7-15-7h-51l19-80c2-2 3-6 3-7 0-11-9-18-19-18-14 0-21 9-26 23-3 14 4-12-20 82h-54c-10 0-17 0-17 12 0 7 6 7 15 7h51l-31 126c-4 14-9 33-9 40 0 32 28 51 58 51 60 0 94-75 94-82s-7-7-8-7c-8 0-8 1-12 10-15 34-43 64-72 64-12 0-19-7-19-26 0-5 3-17 4-22z">
            <text:p/>
          </draw:path>
          <draw:path draw:style-name="gr18" draw:text-style-name="P10" draw:layer="layout" svg:width="0.305cm" svg:height="0.528cm" svg:x="25.424cm" svg:y="10.101cm" svg:viewBox="0 0 306 529" svg:d="M306 358c0-91-62-169-145-169-37 0-70 13-98 40v-150c16 4 41 9 65 9 95 0 149-70 149-79 0-5-2-9-8-9 0 0-2 0-6 3-16 7-53 23-105 23-30 0-66-6-102-22-6-2-8-2-9-2-8 0-8 6-8 18v227c0 14 0 20 11 20 6 0 7-2 11-6 8-12 36-55 98-55 40 0 59 35 65 50 12 29 15 58 15 96 0 28 0 74-19 106-18 30-47 50-82 50-56 0-100-41-114-86 3 0 5 1 14 1 25 0 38-19 38-37 0-19-13-39-38-39-11 0-38 6-38 41 0 67 53 141 139 141 89 0 167-73 167-171z">
            <text:p/>
          </draw:path>
          <draw:path draw:style-name="gr18" draw:text-style-name="P10" draw:layer="layout" svg:width="0.18cm" svg:height="0.34cm" svg:x="25.793cm" svg:y="10.391cm" svg:viewBox="0 0 181 341" svg:d="M110 125h54c11 0 17 0 17-13 0-7-6-7-16-7h-51l20-79c1-3 2-6 2-7 0-11-8-19-19-19-13 0-21 10-26 23-3 15 4-12-20 82h-54c-10 0-17 0-17 12 0 8 6 8 16 8h50l-31 126c-4 13-9 33-9 40 0 31 28 50 58 50 61 0 94-75 94-82 0-8-7-7-8-7-7 0-7 1-12 11-15 34-42 64-71 64-12 0-20-7-20-27 0-4 3-16 4-21z">
            <text:p/>
          </draw:path>
          <draw:path draw:style-name="gr18" draw:text-style-name="P10" draw:layer="layout" svg:width="0.318cm" svg:height="0.528cm" svg:x="15.378cm" svg:y="6.242cm" svg:viewBox="0 0 319 529" svg:d="M190 241c63-21 108-74 108-135 0-63-68-106-141-106-78 0-137 46-137 105 0 25 17 39 40 39s39-16 39-39c0-38-36-38-47-38 23-38 73-48 101-48 32 0 75 17 75 86 0 9-3 54-22 88-23 37-49 39-69 39-6 2-24 3-30 3-6 1-11 2-11 9 0 9 5 9 18 9h34c63 0 92 52 92 128 0 104-53 126-87 126s-92-13-118-58c26 4 50-13 50-42 0-28-20-43-42-43-19 0-43 11-43 44 0 70 71 121 155 121 94 0 164-70 164-148 0-63-49-123-129-140z">
            <text:p/>
          </draw:path>
          <draw:path draw:style-name="gr18" draw:text-style-name="P10" draw:layer="layout" svg:width="0.179cm" svg:height="0.34cm" svg:x="15.753cm" svg:y="6.533cm" svg:viewBox="0 0 180 341" svg:d="M109 124h54c11 0 17 0 17-12 0-7-6-7-15-7h-51l19-80c2-2 3-6 3-7 0-11-9-18-20-18-13 0-20 10-25 23-4 14 4-12-20 82h-55c-9 0-16 0-16 12 0 7 6 7 15 7h51l-32 127c-3 13-8 32-8 39 0 32 28 51 58 51 60 0 94-75 94-82s-7-7-9-7c-7 0-7 1-12 11-14 33-42 63-71 63-12 0-19-7-19-26 0-5 2-17 4-22z">
            <text:p/>
          </draw:path>
          <draw:path draw:style-name="gr18" draw:text-style-name="P10" draw:layer="layout" svg:width="0.318cm" svg:height="0.528cm" svg:x="23.369cm" svg:y="6.257cm" svg:viewBox="0 0 319 529" svg:d="M249 267v26c0 179-79 214-124 214-13 0-55-1-76-28 34 0 40-21 40-34 0-25-18-35-35-35-12 0-35 6-35 36 0 52 41 83 106 83 100 0 194-105 194-270 0-207-89-259-158-259-42 0-79 14-112 48-32 35-49 68-49 125 0 96 67 172 153 172 47 0 78-33 96-78zM154 326c-12 0-48 0-71-48-14-29-14-66-14-105 0-41 0-77 16-106 21-38 50-48 76-48 36 0 62 27 75 60 8 26 12 74 12 109 0 64-26 138-94 138z">
            <text:p/>
          </draw:path>
          <draw:path draw:style-name="gr18" draw:text-style-name="P10" draw:layer="layout" svg:width="0.18cm" svg:height="0.34cm" svg:x="23.743cm" svg:y="6.548cm" svg:viewBox="0 0 181 341" svg:d="M110 124h54c11 0 17 0 17-12 0-7-6-7-15-7h-51l19-80c1-2 3-6 3-7 0-11-9-18-20-18-13 0-20 10-25 23-4 14 4-12-20 82h-55c-9 0-17 0-17 12 0 7 6 7 16 7h51l-32 127c-3 13-8 32-8 39 0 32 28 51 58 51 60 0 94-75 94-82s-7-7-9-7c-7 0-7 1-12 11-14 33-42 64-71 64-12 0-19-8-19-27 0-5 2-17 4-22z">
            <text:p/>
          </draw:path>
          <draw:path draw:style-name="gr18" draw:text-style-name="P10" draw:layer="layout" svg:width="0.318cm" svg:height="0.528cm" svg:x="18.726cm" svg:y="11.658cm" svg:viewBox="0 0 319 529" svg:d="M249 268v25c0 179-79 214-124 214-13 0-55-1-76-27 34 0 40-22 40-35 0-24-18-35-35-35-12 0-35 6-35 36 0 52 41 83 106 83 100 0 194-105 194-270 0-207-89-259-158-259-42 0-79 15-112 48-32 35-49 68-49 126 0 95 67 171 153 171 47 0 78-33 96-77zM154 327c-12 0-48 0-71-49-15-28-15-66-15-104 0-41 0-77 17-106 21-39 50-49 76-49 36 0 62 27 75 61 8 25 12 73 12 108 0 64-27 139-94 139z">
            <text:p/>
          </draw:path>
          <draw:path draw:style-name="gr18" draw:text-style-name="P10" draw:layer="layout" svg:width="0.293cm" svg:height="0.377cm" svg:x="19.117cm" svg:y="11.912cm" svg:viewBox="0 0 294 378" svg:d="M129 17c0-1 1-9 1-9 0-3-1-8-8-8-11 0-55 5-69 6-3 0-12 1-12 12 0 7 9 7 15 7 25 0 25 5 25 9 0 3-1 7-1 12l-76 303c-4 10-4 11-4 12 0 9 7 17 20 17 6 0 15-2 21-13 1-4 6-23 9-34l13-48c1-8 7-29 8-36 5-21 5-22 16-39 18-26 45-56 87-56 30 0 31 24 31 37 0 33-23 92-31 115-6 15-9 20-9 28 0 29 24 46 51 46 54 0 78-73 78-82 0-7-7-7-9-7-8 0-8 4-10 10-12 43-36 65-57 65-12 0-14-7-14-19 0-13 4-20 13-44 6-17 28-73 28-103 0-9 0-32-19-47-10-6-26-15-51-15-39 0-67 22-87 45z">
            <text:p/>
          </draw:path>
          <draw:path draw:style-name="gr18" draw:text-style-name="P10" draw:layer="layout" svg:width="0.319cm" svg:height="0.528cm" svg:x="23.066cm" svg:y="8.908cm" svg:viewBox="0 0 320 529" svg:d="M69 260v-19c0-194 95-222 135-222 18 0 51 5 68 31-12 0-43 0-43 34 0 24 19 36 35 36 12 0 37-7 37-37 0-46-34-83-98-83-99 0-203 99-203 268 0 207 90 261 161 261 85 0 159-73 159-174 0-97-69-171-154-171-52 0-81 39-97 76zM161 507c-48 0-71-46-76-58-15-36-15-97-15-111 0-60 26-137 94-137 14 0 49 0 73 48 13 28 13 68 13 105s0 76-13 104c-23 45-58 49-76 49z">
            <text:p/>
          </draw:path>
          <draw:path draw:style-name="gr18" draw:text-style-name="P10" draw:layer="layout" svg:width="0.293cm" svg:height="0.377cm" svg:x="23.458cm" svg:y="9.162cm" svg:viewBox="0 0 294 378" svg:d="M129 16c0-1 1-8 1-8 0-4-1-8-8-8-11 0-56 4-69 6-4 0-12 1-12 12 0 7 8 7 14 7 26 0 26 4 26 8 0 3-1 8-1 12l-76 304c-4 10-4 11-4 12 0 8 7 17 19 17 6 0 16-3 22-13 1-4 6-23 8-34l14-48c1-9 7-29 8-36 5-21 5-22 16-39 18-26 44-57 87-57 30 0 31 24 31 38 0 32-23 91-31 114-6 16-9 21-9 29 0 29 24 46 51 46 54 0 78-74 78-82 0-7-7-7-10-7-7 0-7 3-9 9-12 44-36 65-57 65-12 0-14-7-14-19s3-19 13-43c6-17 28-74 28-104 0-8 0-31-20-47-9-6-25-14-50-14-39 0-68 21-87 44z">
            <text:p/>
          </draw:path>
          <draw:path draw:style-name="gr18" draw:text-style-name="P10" draw:layer="layout" svg:width="0.339cm" svg:height="0.519cm" svg:x="25.306cm" svg:y="7.726cm" svg:viewBox="0 0 340 520" svg:d="M205 394v66c0 27-2 36-59 36h-16v24c32-2 71-2 104-2s72 0 105 2v-24h-17c-57 0-58-9-58-36v-66h76v-25h-76v-349c0-16 0-20-13-20-6 0-9 0-15 9l-236 360v25zM209 369h-187l187-286z">
            <text:p/>
          </draw:path>
          <draw:path draw:style-name="gr18" draw:text-style-name="P10" draw:layer="layout" svg:width="0.293cm" svg:height="0.377cm" svg:x="25.709cm" svg:y="7.988cm" svg:viewBox="0 0 294 378" svg:d="M129 17c0-2 1-9 1-9 0-3-1-8-9-8-11 0-55 5-68 6-4 0-12 1-12 12 0 7 8 7 14 7 25 0 25 4 25 8 0 3-1 8-1 13l-76 303c-3 10-3 11-3 12 0 9 7 17 19 17 6 0 16-2 22-13 1-4 6-23 8-34l13-48c1-9 7-29 9-36 5-21 5-22 15-39 18-26 45-56 87-56 30 0 31 24 31 37 0 32-22 91-31 114-6 16-8 21-8 29 0 29 24 46 50 46 55 0 79-73 79-82 0-7-8-7-10-7-7 0-7 3-10 10-12 43-36 65-56 65-12 0-15-8-15-20s4-19 14-43c6-17 27-74 27-104 0-8 0-31-19-47-10-6-25-14-51-14-38 0-67 22-86 44z">
            <text:p/>
          </draw:path>
          <draw:path draw:style-name="gr18" draw:text-style-name="P10" draw:layer="layout" svg:width="0.318cm" svg:height="0.528cm" svg:x="18.618cm" svg:y="6.181cm" svg:viewBox="0 0 319 529" svg:d="M92 161c-35-23-38-49-38-62 0-47 50-79 105-79s105 39 105 95c0 44-31 81-76 107zM204 234c56-29 93-69 93-119 0-71-67-115-137-115-77 0-140 57-140 129 0 14 1 49 34 85 8 8 37 27 56 41-44 23-110 65-110 142 0 81 78 132 159 132 86 0 160-64 160-145 0-28-8-63-39-96-14-15-26-23-76-54zM127 267l96 60c21 14 57 37 57 84 0 57-57 97-120 97-66 0-122-47-122-111 0-45 24-94 89-130z">
            <text:p/>
          </draw:path>
          <draw:path draw:style-name="gr18" draw:text-style-name="P10" draw:layer="layout" svg:width="0.293cm" svg:height="0.378cm" svg:x="19.009cm" svg:y="6.435cm" svg:viewBox="0 0 294 379" svg:d="M129 17c0-1 1-8 1-8 0-4-1-9-8-9-11 0-56 5-69 6-3 0-12 1-12 12 0 7 9 7 15 7 25 0 25 5 25 9s-1 7-1 12l-76 304c-4 9-4 10-4 12 0 8 7 17 19 17 6 0 16-3 22-14 1-3 6-23 9-33l13-49c1-8 7-29 8-36 5-20 5-22 16-38 18-27 44-57 87-57 30 0 31 24 31 37 0 33-23 92-31 115-6 15-9 20-9 29 0 29 24 46 51 46 54 0 78-74 78-82s-7-8-9-8c-8 0-8 4-10 10-12 43-36 65-57 65-12 0-14-7-14-19s3-20 13-44c6-16 28-73 28-103 0-9 0-32-20-47-9-6-25-15-50-15-39 0-68 22-87 45z">
            <text:p/>
          </draw:path>
          <draw:path draw:style-name="gr18" draw:text-style-name="P10" draw:layer="layout" svg:width="0.305cm" svg:height="0.511cm" svg:x="10.594cm" svg:y="6.231cm" svg:viewBox="0 0 306 512" svg:d="M59 453l82-79c119-106 165-147 165-224 0-88-69-150-163-150-87 0-143 71-143 140 0 42 38 42 41 42 13 0 39-8 39-41 0-19-14-40-41-40-6 0-7 0-9 2 17-51 59-79 103-79 70 0 103 63 103 126 0 61-38 121-81 169l-147 164c-8 9-8 11-8 29h285l21-134h-18c-5 23-10 57-18 69-5 6-56 6-73 6z">
            <text:p/>
          </draw:path>
          <draw:path draw:style-name="gr18" draw:text-style-name="P10" draw:layer="layout" svg:width="0.293cm" svg:height="0.377cm" svg:x="10.979cm" svg:y="6.485cm" svg:viewBox="0 0 294 378" svg:d="M129 17c0-1 1-9 1-9 0-3-1-8-8-8-11 0-56 5-69 6-4 0-12 1-12 12 0 7 8 7 14 7 26 0 26 5 26 9 0 3-1 7-1 12l-76 303c-4 10-4 11-4 12 0 9 7 17 19 17 6 0 16-2 22-13 1-4 6-23 8-34l14-48c1-8 7-29 8-36 5-21 5-22 16-39 18-26 44-56 87-56 30 0 31 24 31 37 0 33-23 92-31 115-6 15-9 20-9 28 0 29 24 46 51 46 54 0 78-73 78-82 0-7-7-7-9-7-8 0-8 4-10 10-12 43-36 65-57 65-12 0-14-7-14-19 0-13 3-20 13-44 6-17 28-73 28-103 0-9 0-32-20-47-9-6-25-15-50-15-39 0-68 22-87 45z">
            <text:p/>
          </draw:path>
        </draw:g>
        <draw:g draw:style-name="gr23" xml:id="id9" draw:id="id9">
          <svg:title>TexMaths</svg:title>
          <svg:desc>28§display§d(A, B) = n - c - \frac{i}{2}§svg§600§TRUE§</svg:desc>
          <draw:g draw:style-name="gr1">
            <draw:path draw:style-name="gr24" draw:text-style-name="P10" draw:layer="layout" svg:width="0.466cm" svg:height="0.692cm" svg:x="12.885cm" svg:y="3.762cm" svg:viewBox="0 0 467 693" svg:d="M467 11c-3-4 0-11-11-11-14 0-109 8-126 11-8 0-14 6-14 20 0 11 11 11 25 11 48 0 48 6 48 17-1 6-2 13-3 19-19 78-39 155-59 232-16-36-44-61-89-61-115 0-238 142-238 288 0 92 56 156 132 156 19 0 70-5 128-75 6 42 42 75 90 75 33 0 56-22 73-55 16-34 18-64 28-96 0-11-9-11-12-11-11 0-11 6-14 17-16 64-33 123-75 123-25 0-28-25-28-45 0-25 0-30 5-47 47-189 94-379 140-568zM263 565c-3 17-3 19-19 36-42 53-82 70-110 70-50 0-64-53-64-92 0-51 31-171 56-215 28-59 73-96 112-96 64 0 78 82 78 87 0 6-3 14-3 17-16 64-33 129-50 193z">
              <text:p/>
            </draw:path>
            <draw:path draw:style-name="gr24" draw:text-style-name="P10" draw:layer="layout" svg:width="0.226cm" svg:height="0.98cm" svg:x="13.456cm" svg:y="3.709cm" svg:viewBox="0 0 227 981" svg:d="M227 970c0-3 0-5-17-22-123-123-154-308-154-459 0-170 39-341 160-464 11-11 11-14 11-17 0-5-3-8-9-8-11 0-98 64-156 190-51 109-62 218-62 299 0 79 11 196 64 308 59 120 143 184 154 184 6 0 9-2 9-11z">
              <text:p/>
            </draw:path>
            <draw:path draw:style-name="gr24" draw:text-style-name="P10" draw:layer="layout" svg:width="0.674cm" svg:height="0.704cm" svg:x="13.775cm" svg:y="3.74cm" svg:viewBox="0 0 675 705" svg:d="M143 593c-39 64-79 78-123 81-12 0-20 0-20 19 0 6 6 12 14 12 25 0 56-3 84-3 31 0 67 3 98 3 6 0 20 0 20-20 0-11-12-11-17-11-23-3-48-9-48-34 0-11 9-22 14-36 25-42 51-84 76-126 82 0 164 0 246 0 3 20 17 154 17 162 0 31-51 34-70 34-14 0-25 0-25 19 0 12 11 12 14 12 39 0 84-3 123-3 25 0 87 3 112 3 5 0 17 0 17-20 0-11-12-11-23-11-61 0-61-6-64-36-20-205-39-409-59-613-3-19-3-25-20-25-16 0-19 8-25 17-114 192-227 384-341 576zM260 447c65-108 129-216 193-324 11 108 21 216 31 324-74 0-149 0-224 0z">
              <text:p/>
            </draw:path>
            <draw:path draw:style-name="gr24" draw:text-style-name="P10" draw:layer="layout" svg:width="0.114cm" svg:height="0.293cm" svg:x="14.561cm" svg:y="4.341cm" svg:viewBox="0 0 115 294" svg:d="M115 103c0-67-23-103-62-103-33 0-53 22-53 50s20 53 53 53c11 0 25-5 34-14 3 0 3-1 5-2 1 5 3 2 3 16 0 73-36 132-67 163-11 11-11 14-11 16 0 6 5 12 8 12 11 0 90-76 90-191z">
              <text:p/>
            </draw:path>
            <draw:path draw:style-name="gr24" draw:text-style-name="P10" draw:layer="layout" svg:width="0.702cm" svg:height="0.67cm" svg:x="14.955cm" svg:y="3.773cm" svg:viewBox="0 0 703 671" svg:d="M115 596c-9 36-11 44-87 44-17 0-28 0-28 20 0 11 8 11 28 11 117 0 233 0 350 0 154 0 271-117 271-212 0-70-56-129-154-137 104-20 208-93 208-185 0-73-65-137-182-137-111 0-222 0-333 0-17 0-28 0-28 20 0 11 8 11 28 11 2 0 22 0 36 3 20 0 28 2 28 14 0 5 0 8-3 19-45 176-89 352-134 529zM266 310c19-81 39-162 59-243 8-33 11-36 53-36 43 0 86 0 129 0 86 0 106 58 106 100 0 87-84 179-204 179-48 0-96 0-143 0zM221 640c-14 0-17 0-22 0-11-2-14-2-14-11 0-3 0-5 5-22 23-92 45-183 68-274 62 0 125 0 187 0 95 0 112 72 112 114 0 98-87 193-202 193-44 0-89 0-134 0z">
              <text:p/>
            </draw:path>
            <draw:path draw:style-name="gr24" draw:text-style-name="P10" draw:layer="layout" svg:width="0.229cm" svg:height="0.98cm" svg:x="15.764cm" svg:y="3.709cm" svg:viewBox="0 0 230 981" svg:d="M230 489c0-75-12-195-65-304-59-123-145-185-154-185-5 0-11 3-11 8 0 3 0 6 20 23 95 98 154 254 154 458 0 168-37 341-160 465-14 11-14 13-14 16 0 6 6 11 11 11 9 0 98-67 157-192 50-107 62-216 62-300z">
              <text:p/>
            </draw:path>
            <draw:path draw:style-name="gr24" draw:text-style-name="P10" draw:layer="layout" svg:width="0.654cm" svg:height="0.228cm" svg:x="16.419cm" svg:y="4.083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24" draw:text-style-name="P10" draw:layer="layout" svg:width="0.531cm" svg:height="0.444cm" svg:x="17.432cm" svg:y="4.011cm" svg:viewBox="0 0 532 445" svg:d="M56 375c-3 14-8 39-8 42 0 19 14 28 28 28s30-9 36-28c3-3 14-48 20-73 7-30 14-60 22-90 6-19 11-41 17-64 3-17 11-45 11-50 17-31 67-120 162-120 42 0 51 36 51 69 0 62-48 188-62 230-11 22-11 33-11 45 0 44 33 81 81 81 92 0 129-146 129-151 0-12-9-12-11-12-12 0-12 3-17 17-20 67-51 123-98 123-17 0-25-8-25-33 0-23 8-48 19-67 17-54 59-163 59-219 0-64-42-103-112-103-89 0-137 62-154 84-5-53-46-84-92-84s-62 36-73 56c-17 33-28 89-28 95 0 8 8 8 11 8 9 0 11 0 17-22 17-70 36-117 70-117 20 0 31 14 31 47 0 20-3 31-14 81-20 76-39 151-59 227z">
              <text:p/>
            </draw:path>
            <draw:path draw:style-name="gr24" draw:text-style-name="P10" draw:layer="layout" svg:width="0.601cm" svg:height="0.038cm" svg:x="18.291cm" svg:y="4.179cm" svg:viewBox="0 0 602 39" svg:d="M568 39c17 0 34 0 34-19 0-20-17-20-34-20-177 0-354 0-532 0-16 0-36 0-36 20 0 19 20 19 36 19 178 0 355 0 532 0z">
              <text:p/>
            </draw:path>
            <draw:path draw:style-name="gr24" draw:text-style-name="P10" draw:layer="layout" svg:width="0.382cm" svg:height="0.444cm" svg:x="19.234cm" svg:y="4.011cm" svg:viewBox="0 0 383 445" svg:d="M350 59c-17 0-31 0-45 14-14 16-17 33-17 39 0 22 17 33 37 33 28 0 56-22 56-61 0-48-48-84-118-84-131 0-263 140-263 277 0 89 56 168 160 168 139 0 223-104 223-118 0-5-5-11-14-11-2 0-5 0-11 8-78 98-184 98-196 98-64 0-89-47-89-106 0-42 19-137 53-196 31-56 84-100 137-100 34 0 73 14 87 39z">
              <text:p/>
            </draw:path>
            <draw:path draw:style-name="gr24" draw:text-style-name="P10" draw:layer="layout" svg:width="0.598cm" svg:height="0.038cm" svg:x="19.92cm" svg:y="4.179cm" svg:viewBox="0 0 599 39" svg:d="M565 39c17 0 34 0 34-19 0-20-17-20-34-20-177 0-354 0-531 0-17 0-34 0-34 20 0 19 17 19 34 19 177 0 354 0 531 0z">
              <text:p/>
            </draw:path>
            <draw:path draw:style-name="gr24" draw:text-style-name="P10" draw:layer="layout" svg:width="0.257cm" svg:height="0.659cm" svg:x="21.044cm" svg:y="3.13cm" svg:viewBox="0 0 258 660" svg:d="M249 36c0-19-14-36-36-36-25 0-53 25-53 53 0 20 14 34 39 34 22 0 50-23 50-51zM176 405c12-28 12-30 20-55 8-20 14-34 14-54 0-44-31-81-81-81-93 0-129 143-129 151 0 11 8 11 11 11 9 0 11-2 14-19 28-92 67-120 101-120 8 0 25 0 25 30 0 20-8 42-11 51-8 25-53 140-67 182-11 25-23 58-23 78 0 47 31 81 79 81 92 0 129-143 129-151s-9-8-12-8c-8 0-8 2-14 16-16 62-50 121-100 121-17 0-23-9-23-31 0-25 6-39 28-98 13-35 26-69 39-104z">
              <text:p/>
            </draw:path>
            <draw:path draw:style-name="gr24" draw:text-style-name="P10" draw:layer="layout" svg:width="0.492cm" svg:height="0.038cm" svg:x="20.937cm" svg:y="4.179cm" svg:viewBox="0 0 493 39" svg:d="M246 39c-82 0-164 0-246 0 0-13 0-26 0-39 164 0 328 0 493 0 0 13 0 26 0 39-82 0-165 0-247 0z">
              <text:p/>
            </draw:path>
            <draw:path draw:style-name="gr24" draw:text-style-name="P10" draw:layer="layout" svg:width="0.391cm" svg:height="0.653cm" svg:x="20.988cm" svg:y="4.464cm" svg:viewBox="0 0 392 654" svg:d="M76 579c34-34 69-67 103-101 154-137 213-190 213-288 0-112-90-190-210-190-109 0-182 89-182 176 0 56 48 56 50 56 17 0 54-11 54-50 0-28-20-53-54-53-8 0-11 0-14 2 23-64 76-100 135-100 89 0 131 78 131 159 0 78-50 157-103 218-63 70-125 140-188 210-11 11-11 11-11 36 121 0 243 0 364 0 9-57 19-113 28-170-9 0-17 0-25 0-6 28-12 72-23 86-5 9-70 9-92 9-59 0-118 0-176 0z">
              <text:p/>
            </draw:path>
          </draw:g>
        </draw:g>
        <draw:path draw:style-name="gr25" draw:text-style-name="P13" draw:layer="layout" svg:width="0.557cm" svg:height="0.556cm" svg:x="17.036cm" svg:y="9.01cm" svg:viewBox="0 0 558 557" svg:d="M558 278c0 49-14 97-38 140-25 42-60 76-102 101-43 24-90 38-139 38s-97-14-139-38c-43-25-78-59-102-101-25-43-38-91-38-140s13-97 38-139c24-42 59-78 102-102 42-25 90-37 139-37s96 12 139 37c42 24 78 60 102 102 25 42 38 90 38 139z">
          <text:p/>
        </draw:path>
        <draw:path draw:style-name="gr26" draw:text-style-name="P14" draw:layer="layout" svg:width="0.557cm" svg:height="0.556cm" svg:x="17.036cm" svg:y="9.01cm" svg:viewBox="0 0 558 557" svg:d="M558 278c0 49-14 97-38 140-25 42-60 76-102 101-43 24-90 38-139 38s-97-14-139-38c-43-25-78-59-102-101-25-43-38-91-38-140s13-97 38-139c24-42 59-77 102-102 42-24 90-37 139-37s97 13 139 37c43 25 77 60 102 102 24 42 38 90 38 139z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CharColor;ColorStyle;Accelerate;Decelerate;AutoReverse" presentation:text-only="true" presentation:node-type="on-click" presentation:preset-class="emphasis" presentation:preset-id="ooo-emphasis-font-color" presentation:preset-sub-type="2">
                  <anim:animateColor smil:dur="2s" smil:fill="hold" smil:targetElement="id4" anim:sub-item="text" smil:attributeName="color" smil:to="#ffffff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2s" smil:fill="hold" smil:targetElement="id5" anim:sub-item="text" smil:attributeName="color" smil:to="#3faf46" anim:color-interpolation="rgb" anim:color-interpolation-direction="clockwise"/>
                </anim:par>
                <anim:par smil:begin="0s" smil:fill="hold" presentation:preset-property="CharColor;ColorStyle;Accelerate;Decelerate;AutoReverse" presentation:text-only="true" presentation:node-type="with-previous" presentation:preset-class="emphasis" presentation:preset-id="ooo-emphasis-font-color" presentation:preset-sub-type="2">
                  <anim:animateColor smil:dur="2s" smil:fill="hold" smil:targetElement="id6" anim:sub-item="text" smil:attributeName="color" smil:to="#5983b0" anim:color-interpolation="rgb" anim:color-interpolation-direction="clockwise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7" smil:attributeName="opacity" smil:to="0.2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preset-property="CharColor;ColorStyle;Accelerate;Decelerate;AutoReverse" presentation:text-only="true" presentation:node-type="with-previous" presentation:preset-class="emphasis" presentation:preset-id="ooo-emphasis-font-color" presentation:preset-sub-type="2">
                  <anim:animateColor smil:dur="2s" smil:fill="hold" smil:targetElement="id5" anim:sub-item="text" smil:attributeName="color" smil:to="#ffffff" anim:color-interpolation="rgb" anim:color-interpolation-direction="clockwise"/>
                </anim:par>
                <anim:par smil:begin="0s" smil:fill="hold" presentation:preset-property="CharColor;ColorStyle;Accelerate;Decelerate;AutoReverse" presentation:text-only="true" presentation:node-type="with-previous" presentation:preset-class="emphasis" presentation:preset-id="ooo-emphasis-font-color" presentation:preset-sub-type="2">
                  <anim:animateColor smil:dur="2s" smil:fill="hold" smil:targetElement="id6" anim:sub-item="text" smil:attributeName="color" smil:to="#ffffff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0" smil:attributeName="opacity" smil:to="0.2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" anim:sub-item="text" smil:attributeName="opacity" smil:to="0.2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5" anim:sub-item="text" smil:attributeName="opacity" smil:to="0.2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6" anim:sub-item="text" smil:attributeName="opacity" smil:to="0.2"/>
                </anim:par>
                <anim:par smil:begin="0s" presentation:preset-property="CharColor;ColorStyle;Accelerate;Decelerate;AutoReverse" presentation:text-only="true" presentation:node-type="with-previous" presentation:preset-class="emphasis" presentation:preset-id="ooo-emphasis-font-color" presentation:preset-sub-type="2">
                  <anim:animateColor smil:dur="0s" smil:fill="hold" smil:targetElement="id11" anim:sub-item="text" smil:attributeName="color" smil:to="#ffffff" anim:color-interpolation="rgb" anim:color-interpolation-direction="clockwis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presentation:preset-property="Transparency" presentation:node-type="with-previous" presentation:preset-class="emphasis" presentation:preset-id="ooo-emphasis-transparency">
                  <anim:set smil:dur="indefinite" smil:targetElement="id7" smil:attributeName="opacity" smil:to="1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8" draw:layer="layout" svg:width="19.798cm" svg:height="11.136cm" svg:x="0.6cm" svg:y="2.257cm" draw:page-number="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vo" svg:font-family="Arvo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Math" svg:font-family="'Latin Modern Math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  <style:font-face style:name="cmmi10" svg:font-family="cmmi10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6cm" svg:stroke-color="#ffffff" draw:marker-start-width="0.33cm" draw:marker-start-center="false" draw:marker-end-width="0.33cm" draw:marker-end-center="false" svg:stroke-linecap="round" draw:fill="solid" draw:fill-color="#8d281e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>
      <style:graphic-properties draw:stroke="solid" svg:stroke-color="#dddddd" draw:fill="solid" draw:fill-color="#729fcf"/>
      <style:text-properties fo:color="#ffffff" loext:opacity="10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Default_20_Drawing_20_Style_5f_1" style:display-name="Default Drawing Style_1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_5f_1" style:display-name="Default Drawing Style_1_1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_5f_1">
      <style:graphic-properties draw:stroke-dash="Dashed_20__28_var_29__20_2" svg:stroke-color="#000000" draw:marker-end="Arrow_20_concave" draw:marker-end-width="0.6cm" draw:fill="solid" draw:fill-color="#008000" draw:fill-image-width="0cm" draw:fill-image-height="0cm"/>
    </style:style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499cm" fo:margin-bottom="0cm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atin Modern Math" fo:font-family="'Latin Modern Math'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Arvo" fo:font-family="Arvo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ection-background" style:family="presentation">
      <style:graphic-properties draw:stroke="none" draw:fill="solid" draw:fill-color="#000000"/>
      <style:text-properties style:letter-kerning="true"/>
    </style:style>
    <style:style style:name="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true" draw:fit-to-contour="false" fo:max-height="0cm" fo:max-width="0cm" fo:min-height="9.135cm" fo:min-width="0cm" fo:padding-top="0cm" fo:padding-bottom="0cm" fo:padding-left="0cm" fo:padding-right="0cm" fo:wrap-option="no-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 style:writing-mode="lr-tb">
        <text:list-style style:name="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Section-outline2" style:family="presentation" style:parent-style-name="Sectio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ection-outline3" style:family="presentation" style:parent-style-name="Sectio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ection-outline4" style:family="presentation" style:parent-style-name="Sectio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ection-outline5" style:family="presentation" style:parent-style-name="Sectio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ection-outline6" style:family="presentation" style:parent-style-name="Sectio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ection-outline7" style:family="presentation" style:parent-style-name="Sectio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ection-outline8" style:family="presentation" style:parent-style-name="Sectio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ection-outline9" style:family="presentation" style:parent-style-name="Sectio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ection-subtitle" style:family="presentation">
      <style:graphic-properties draw:stroke="none" draw:fill="none" draw:textarea-vertical-align="middle">
        <text:list-style style:name="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-title" style:family="presentation">
      <style:graphic-properties draw:stroke="none" draw:fill="none" draw:textarea-vertical-align="top">
        <text:list-style style:name="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Arvo" fo:font-family="Arvo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atin Modern Math" fo:font-family="'Latin Modern Math'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Arvo" fo:font-family="Arvo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Arvo" fo:font-family="Arvo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1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1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1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Title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Title-outline1">
      <style:graphic-properties fo:min-height="9.13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Section-title">
      <style:graphic-properties draw:auto-grow-height="false" fo:min-height="2.63cm" loext:decorative="false"/>
      <style:paragraph-properties style:writing-mode="lr-tb"/>
    </style:style>
    <style:style style:name="Mpr6" style:family="presentation" style:parent-style-name="Sec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Sec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One_20_Column-title">
      <style:graphic-properties draw:auto-grow-height="false" fo:min-height="2.63cm" loext:decorative="false"/>
      <style:paragraph-properties style:writing-mode="lr-tb"/>
    </style:style>
    <style:style style:name="Mpr9" style:family="presentation" style:parent-style-name="One_20_Column-outline1">
      <style:graphic-properties fo:min-height="9.135cm" loext:decorative="false"/>
      <style:paragraph-properties style:writing-mode="lr-tb"/>
    </style:style>
    <style:style style:name="Mpr10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1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Two_20_columns-title">
      <style:graphic-properties draw:auto-grow-height="false" fo:min-height="2.63cm" loext:decorative="false"/>
      <style:paragraph-properties style:writing-mode="lr-tb"/>
    </style:style>
    <style:style style:name="Mpr14" style:family="presentation" style:parent-style-name="Two_20_columns-outline1">
      <style:graphic-properties fo:min-height="9.135cm" loext:decorative="false"/>
      <style:paragraph-properties style:writing-mode="lr-tb"/>
    </style:style>
    <style:style style:name="Mpr15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6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7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text-properties fo:font-size="18pt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gradient-name="Gradient_20_10"/>
      <style:paragraph-properties fo:text-align="center"/>
    </style:style>
    <style:style style:name="MP9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0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Titl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992cm" svg:height="4.851cm" svg:x="0.699cm" svg:y="0.699cm" presentation:class="title">
        <draw:text-box>
          <text:p>Click to edit the title text format</text:p>
        </draw:text-box>
      </draw:frame>
      <draw:frame presentation:style-name="Mpr2" draw:layer="backgroundobjects" svg:width="17.993cm" svg:height="7.218cm" svg:x="4.398cm" svg:y="6.799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12.196cm" svg:height="0.962cm" svg:x="11.396cm" svg:y="13.598cm">
        <draw:text-box>
          <text:p><text:span text:style-name="MT2"><text:author-name text:fixed="false"> </text:author-name></text:span></text:p>
        </draw:text-box>
      </draw:frame>
      <presentation:notes style:page-layout-name="PM0">
        <office:forms form:automatic-focus="false" form:apply-design-mode="false"/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5" draw:layer="backgroundobjects" svg:width="25.191cm" svg:height="4.534cm" svg:x="0.209cm" svg:y="4.991cm" presentation:class="title">
        <draw:text-box>
          <text:p>Click to edit the title text format</text:p>
        </draw:text-box>
      </draw:frame>
      <draw:frame presentation:style-name="Section-outline1" draw:layer="backgroundobjects" svg:width="24.636cm" svg:height="0.752cm" svg:x="1.399cm" svg:y="14.565cm" presentation:class="outline" presentation:placeholder="true">
        <draw:text-box/>
      </draw:frame>
      <presentation:notes style:page-layout-name="PM0">
        <draw:page-thumbnail presentation:style-name="Section-title" draw:layer="backgroundobjects" svg:width="19.798cm" svg:height="11.136cm" svg:x="0.6cm" svg:y="2.257cm" presentation:class="page"/>
        <draw:frame presentation:style-name="Section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8" draw:layer="backgroundobjects" svg:width="26.491cm" svg:height="1.8cm" svg:x="0.399cm" svg:y="0.199cm" presentation:class="title">
        <draw:text-box>
          <text:p>Click to edit the title text format</text:p>
        </draw:text-box>
      </draw:frame>
      <draw:frame presentation:style-name="Mpr9" draw:layer="backgroundobjects" svg:width="25.191cm" svg:height="10.784cm" svg:x="1.399cm" svg:y="3.184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text-style-name="MP7" draw:layer="backgroundobjects" svg:width="12.996cm" svg:height="1.14cm" svg:x="6.997cm" svg:y="14.598cm" presentation:class="footer">
        <draw:text-box>
          <text:p text:style-name="MP6"><text:span text:style-name="MT1"><presentation:footer/></text:span></text:p>
        </draw:text-box>
      </draw:frame>
      <draw:custom-shape draw:style-name="Mgr4" draw:text-style-name="MP8" draw:layer="backgroundobjects" svg:width="16.995cm" svg:height="0.05cm" svg:x="0.057cm" svg:y="1.68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3" draw:layer="backgroundobjects" svg:width="26.491cm" svg:height="1.8cm" svg:x="0.399cm" svg:y="0.199cm" presentation:class="title">
        <draw:text-box>
          <text:p>Click to edit the title text format</text:p>
        </draw:text-box>
      </draw:frame>
      <draw:frame presentation:style-name="Mpr14" draw:layer="backgroundobjects" svg:width="12.205cm" svg:height="10.784cm" svg:x="1.399cm" svg:y="3.184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5" draw:text-style-name="MP7" draw:layer="backgroundobjects" svg:width="12.996cm" svg:height="1.14cm" svg:x="6.997cm" svg:y="14.598cm" presentation:class="footer">
        <draw:text-box>
          <text:p text:style-name="MP6"><text:span text:style-name="MT1"><presentation:footer/></text:span></text:p>
        </draw:text-box>
      </draw:frame>
      <draw:custom-shape draw:style-name="Mgr5" draw:text-style-name="MP9" draw:layer="backgroundobjects" svg:width="16.995cm" svg:height="0.05cm" svg:x="0.057cm" svg:y="1.68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10" draw:layer="backgroundobjects" svg:width="0.03cm" svg:height="10.279cm" svg:x="14.038cm" svg:y="2.8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7:53:40.225387309</meta:creation-date>
    <meta:editing-duration>PT24M42S</meta:editing-duration>
    <meta:editing-cycles>5</meta:editing-cycles>
    <meta:generator>LibreOffice/24.2.5.2$Linux_X86_64 LibreOffice_project/420$Build-2</meta:generator>
    <dc:title>Empty Talk DARK (16:9)</dc:title>
    <dc:date>2024-09-27T18:41:11.967372351</dc:date>
    <meta:document-statistic meta:object-count="185"/>
    <meta:template xlink:type="simple" xlink:actuate="onRequest" xlink:title="Empty Talk DARK (16:9)" xlink:href="../../Templates/Empty%20Talk%20DARK%20(16:9).otp" meta:date="2024-09-27T17:53:38.991082589"/>
  </office:meta>
</office:document-meta>
</file>