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ax-height="0cm" fo:min-height="3.3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3.417cm" fo:min-width="5.116cm"/>
    </style:style>
    <style:style style:name="gr3" style:family="graphic" style:parent-style-name="standard">
      <style:graphic-properties draw:stroke="solid" svg:stroke-width="0.1cm" svg:stroke-color="#000000" draw:marker-start-width="0.615cm" draw:marker-end-width="0.615cm" draw:fill="none" draw:fill-color="#ffffff" draw:textarea-horizontal-align="center" draw:textarea-vertical-align="middle" draw:auto-grow-height="true" draw:auto-grow-width="false" fo:max-height="0cm" fo:min-height="3.35cm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5.6cm" svg:height="3.6cm" svg:x="12cm" svg:y="5.6cm">
          <draw:text-box>
            <text:p xml:id="id1" text:id="id1"><text:span text:style-name="T1">First paragraph</text:span></text:p>
            <text:p xml:id="id2" text:id="id2"><text:span text:style-name="T1">Second paragraph is.</text:span></text:p>
          </draw:text-box>
        </draw:frame>
        <draw:custom-shape draw:style-name="gr2" draw:text-style-name="P2" draw:layer="layout" svg:width="5.616cm" svg:height="3.667cm" svg:x="11.998cm" svg:y="5.5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6cm" svg:height="3.7cm" svg:x="5.5cm" svg:y="5.55cm">
          <draw:text-box>
            <text:p><text:span text:style-name="T1">First paragraph</text:span></text:p>
            <text:p><text:span text:style-name="T1">Second paragraph i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_5f_1_5f_1" style:display-name="Predeterminado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" style:display-name="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5-21T23:03:36</meta:creation-date>
    <meta:editing-duration>PT1H50M48S</meta:editing-duration>
    <meta:editing-cycles>36</meta:editing-cycles>
    <dc:date>2016-03-23T08:17:40.205040763</dc:date>
    <meta:generator>LibreOffice/4.4.3.2$Linux_X86_64 LibreOffice_project/40m0$Build-2</meta:generator>
    <meta:document-statistic meta:object-count="30"/>
  </office:meta>
</office:document-meta>
</file>