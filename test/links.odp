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Predeterminado-title">
      <style:graphic-properties draw:auto-grow-height="true" fo:min-height="3.506cm"/>
      <style:paragraph-properties style:writing-mode="lr-tb"/>
    </style:style>
    <style:style style:name="pr2" style:family="presentation" style:parent-style-name="Predeterminado-outline1">
      <style:graphic-properties fo:min-height="11.92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2.407cm"/>
      <style:paragraph-properties style:writing-mode="lr-tb"/>
    </style:style>
    <style:style style:name="pr4" style:family="presentation" style:parent-style-name="Predetermin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Predeterminad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Predetermin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Predetermin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Predetermin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100%" fo:text-align="start" style:punctuation-wrap="simple" style:writing-mode="lr-tb"/>
      <style:text-properties fo:font-size="19.8999996185303pt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4b96" loext:opacity="100%" style:text-line-through-style="none" style:text-line-through-type="none" style:text-position="0% 100%" style:font-name="Verdana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style:rfc-language-tag="es-ES-u-co-trad" fo:language="es" fo:country="E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4b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: 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a xlink:href="#Slide: 2" xlink:type="simple">Página 2</text:a></text:p>
              </text:list-item>
              <text:list-item>
                <text:p><text:a xlink:href="#Slide: 4" xlink:type="simple">Página 4</text:a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" presentation:class="page"/>
          <draw:frame presentation:style-name="pr3" draw:text-style-name="P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Slide: 2" draw:style-name="dp1" draw:master-page-name="Predeterminado" presentation:presentation-page-layout-name="AL2T0">
        <office:forms form:automatic-focus="false" form:apply-design-mode="false"/>
        <draw:custom-shape draw:name="CuadroTexto 2" draw:style-name="gr2" draw:text-style-name="P3" draw:layer="layout" svg:width="9.921cm" svg:height="1.013cm" svg:x="8.611cm" svg:y="9.572cm">
          <text:p text:style-name="P2"><text:span text:style-name="T1">2 vi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1" draw:layer="layout" svg:width="13.785cm" svg:height="10.339cm" svg:x="2.548cm" svg:y="2.095cm" draw:page-number="2" presentation:class="page"/>
          <draw:frame draw:name="Marcador de notas 2" presentation:style-name="pr4" draw:text-style-name="P4" draw:layer="layout" svg:width="15.107cm" svg:height="10.856cm" svg:x="1.887cm" svg:y="13.269cm" presentation:class="notes" presentation:placeholder="true" presentation:user-transformed="true">
            <draw:text-box/>
          </draw:frame>
          <draw:frame draw:name="Marcador de número de diapositiva 3" presentation:style-name="pr5" draw:text-style-name="P6" draw:layer="layout" svg:width="8.177cm" svg:height="1.381cm" svg:x="10.7cm" svg:y="26.188cm" presentation:class="page-number" presentation:user-transformed="true">
            <draw:text-box>
              <text:p text:style-name="P5"><text:span text:style-name="T2"><text:page-number>&lt;número&gt;</text:page-number></text:span></text:p>
            </draw:text-box>
          </draw:frame>
        </presentation:notes>
      </draw:page>
      <draw:page draw:name="Slide: 3" draw:style-name="dp4" draw:master-page-name="Predeterminado">
        <office:forms form:automatic-focus="false" form:apply-design-mode="false"/>
        <draw:custom-shape draw:name="CuadroTexto 3" draw:style-name="gr3" draw:text-style-name="P3" draw:layer="layout" svg:width="9.921cm" svg:height="1.013cm" svg:x="8.611cm" svg:y="9.572cm">
          <text:p text:style-name="P2"><text:span text:style-name="T1">3 ocu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2" draw:style-name="gr1" draw:layer="layout" svg:width="13.785cm" svg:height="10.339cm" svg:x="2.548cm" svg:y="2.095cm" draw:page-number="3" presentation:class="page"/>
          <draw:frame draw:name="Marcador de notas 1" presentation:style-name="pr6" draw:text-style-name="P4" draw:layer="layout" svg:width="15.107cm" svg:height="10.856cm" svg:x="1.887cm" svg:y="13.269cm" presentation:class="notes" presentation:placeholder="true" presentation:user-transformed="true">
            <draw:text-box/>
          </draw:frame>
          <draw:frame draw:name="Marcador de número de diapositiva 1" presentation:style-name="pr5" draw:text-style-name="P6" draw:layer="layout" svg:width="8.177cm" svg:height="1.381cm" svg:x="10.7cm" svg:y="26.188cm" presentation:class="page-number" presentation:user-transformed="true">
            <draw:text-box>
              <text:p text:style-name="P5"><text:span text:style-name="T2"><text:page-number>&lt;número&gt;</text:page-number></text:span></text:p>
            </draw:text-box>
          </draw:frame>
        </presentation:notes>
      </draw:page>
      <draw:page draw:name="Slide: 4" draw:style-name="dp1" draw:master-page-name="Predeterminado">
        <office:forms form:automatic-focus="false" form:apply-design-mode="false"/>
        <draw:custom-shape draw:name="CuadroTexto 1" draw:style-name="gr4" draw:text-style-name="P3" draw:layer="layout" svg:width="9.921cm" svg:height="1.013cm" svg:x="8.611cm" svg:y="9.572cm">
          <text:p text:style-name="P2"><text:span text:style-name="T1">4 vi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3" draw:style-name="gr1" draw:layer="layout" svg:width="13.785cm" svg:height="10.339cm" svg:x="2.548cm" svg:y="2.095cm" draw:page-number="4" presentation:class="page"/>
          <draw:frame draw:name="Marcador de notas 3" presentation:style-name="pr7" draw:text-style-name="P4" draw:layer="layout" svg:width="15.107cm" svg:height="10.856cm" svg:x="1.887cm" svg:y="13.269cm" presentation:class="notes" presentation:placeholder="true" presentation:user-transformed="true">
            <draw:text-box/>
          </draw:frame>
          <draw:frame draw:name="Marcador de número de diapositiva 2" presentation:style-name="pr5" draw:text-style-name="P6" draw:layer="layout" svg:width="8.177cm" svg:height="1.381cm" svg:x="10.7cm" svg:y="26.188cm" presentation:class="page-number" presentation:user-transformed="true">
            <draw:text-box>
              <text:p text:style-name="P5"><text:span text:style-name="T2"><text:page-number>&lt;número&gt;</text:page-number></text:span></text:p>
            </draw:text-box>
          </draw:frame>
        </presentation:notes>
      </draw:page>
      <draw:page draw:name="Slide: 5" draw:style-name="dp1" draw:master-page-name="Predeterminado">
        <office:forms form:automatic-focus="false" form:apply-design-mode="false"/>
        <draw:custom-shape draw:name="CuadroTexto 4" draw:style-name="gr5" draw:text-style-name="P3" draw:layer="layout" svg:width="9.921cm" svg:height="1.013cm" svg:x="8.611cm" svg:y="9.572cm">
          <text:p text:style-name="P2"><text:span text:style-name="T1">5 vi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Marcador de imagen de diapositiva 4" draw:style-name="gr1" draw:layer="layout" svg:width="13.785cm" svg:height="10.339cm" svg:x="2.548cm" svg:y="2.095cm" draw:page-number="5" presentation:class="page"/>
          <draw:frame draw:name="Marcador de notas 4" presentation:style-name="pr8" draw:text-style-name="P4" draw:layer="layout" svg:width="15.107cm" svg:height="10.856cm" svg:x="1.887cm" svg:y="13.269cm" presentation:class="notes" presentation:placeholder="true" presentation:user-transformed="true">
            <draw:text-box/>
          </draw:frame>
          <draw:frame draw:name="Marcador de número de diapositiva 4" presentation:style-name="pr5" draw:text-style-name="P6" draw:layer="layout" svg:width="8.177cm" svg:height="1.381cm" svg:x="10.7cm" svg:y="26.188cm" presentation:class="page-number" presentation:user-transformed="true">
            <draw:text-box>
              <text:p text:style-name="P5"><text:span text:style-name="T2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Estilo_20_de_20_dibujo_20_predeterminado_5f_1" style:display-name="Estilo de dibujo 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draw:stroke-dash="Dash_20_10" svg:stroke-color="#000000" draw:fill="solid" draw:fill-color="#ffffff" draw:fill-image-width="0cm" draw:fill-image-height="0cm"/>
    </style:style>
    <style:style style:name="Estilo_20_de_20_dibujo_20_predeterminado_5f_2" style:display-name="Estilo de dibujo predeterminad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2" style:display-name="Estilo de dibujo 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Estilo_20_de_20_dibujo_20_predeterminado_5f_3" style:display-name="Estilo de dibujo predeterminad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3" style:display-name="Estilo de dibujo 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Estilo_20_de_20_dibujo_20_predeterminado_5f_4" style:display-name="Estilo de dibujo predeterminad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4" style:display-name="Estilo de dibujo 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Estilo_20_de_20_dibujo_20_predeterminado_5f_5" style:display-name="Estilo de dibujo predeterminad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5" style:display-name="Estilo de dibujo 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loext:opacity="0%" loext:color-lum-mod="100%" loext:color-lum-off="0%" style:text-outline="false" style:text-line-through-style="none" style:text-line-through-type="none" fo:font-size="35.299999237060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fo:font-size="26.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3.785cm" svg:height="10.339cm" svg:x="2.548cm" svg:y="2.095cm" presentation:class="page"/>
        <draw:frame presentation:style-name="Predeterminado-notes" draw:layer="backgroundobjects" svg:width="15.104cm" svg:height="12.407cm" svg:x="1.888cm" svg:y="13.0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initial-creator>WinuE</meta:initial-creator>
    <meta:editing-cycles>808</meta:editing-cycles>
    <meta:print-date>2020-01-15T09:46:37</meta:print-date>
    <meta:creation-date>2009-09-13T17:49:46</meta:creation-date>
    <dc:date>2024-02-05T19:35:09.046501762</dc:date>
    <meta:editing-duration>P7DT1H4M17S</meta:editing-duration>
    <meta:generator>LibreOffice/7.5.2.2$Linux_X86_64 LibreOffice_project/53bb9681a964705cf672590721dbc85eb4d0c3a2</meta:generator>
    <meta:document-statistic meta:object-count="34"/>
    <meta:user-defined meta:name="AppVersion">15.0031</meta:user-defined>
    <meta:user-defined meta:name="Company">The houze!</meta:user-defined>
    <meta:user-defined meta:name="Notes" meta:value-type="float">23</meta:user-defined>
    <meta:user-defined meta:name="PresentationFormat">Presentación en pantalla (4:3)</meta:user-defined>
    <meta:user-defined meta:name="Slides" meta:value-type="float">48</meta:user-defined>
  </office:meta>
</office:document-meta>
</file>